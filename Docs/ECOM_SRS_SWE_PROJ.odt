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66" style:master-page-name="MasterPage2" style:family="paragraph" style:name="P42">
      <style:paragraph-properties fo:line-height="65%" fo:text-align="left" fo:margin-left="0cm" fo:margin-right="0cm" fo:text-indent="0cm"/>
      <style:text-properties fo:color="#000000" fo:font-family="Arial" style:font-family-complex="Arial" fo:font-size="26pt" style:font-size-complex="26pt" style:language-complex="hi" style:country-complex="IN" fo:font-style="normal" fo:font-weight="normal"/>
    </style:style>
    <style:style style:family="text" style:name="T506">
      <style:text-properties fo:color="#376092" fo:font-family="DejaVu Math TeX Gyre" style:font-family-complex="DejaVu Math TeX Gyre" fo:font-size="72pt" style:font-size-complex="72pt" style:language-complex="hi" style:country-complex="IN" fo:font-style="normal" fo:font-weight="normal"/>
    </style:style>
    <style:style style:family="text" style:name="T507">
      <style:text-properties fo:color="#376092" fo:font-family="DejaVu Math TeX Gyre" style:font-family-complex="DejaVu Math TeX Gyre" fo:font-size="72pt" style:font-size-complex="72pt" style:language-complex="hi" style:country-complex="IN" fo:font-style="normal" fo:font-weight="normal"/>
    </style:style>
    <style:style style:family="text" style:name="T508">
      <style:text-properties fo:color="#376092" fo:font-family="Arial" style:font-family-complex="Arial" fo:font-size="26pt" style:font-size-complex="26pt" style:language-complex="hi" style:country-complex="IN" fo:font-style="normal" fo:font-weight="normal"/>
    </style:style>
    <style:style style:parent-style-name="766" style:family="paragraph" style:name="P43">
      <style:paragraph-properties fo:line-height="65%" fo:text-align="left" fo:margin-left="0cm" fo:margin-right="0cm" fo:text-indent="0cm"/>
      <style:text-properties fo:color="#000000" fo:font-family="Arial" style:font-family-complex="Arial" fo:font-size="26pt" style:font-size-complex="26pt" style:language-complex="hi" style:country-complex="IN" fo:font-style="normal" fo:font-weight="normal"/>
    </style:style>
    <style:style style:family="text" style:name="T509">
      <style:text-properties fo:color="#376092" fo:font-family="DejaVu Math TeX Gyre" style:font-family-complex="DejaVu Math TeX Gyre" fo:font-size="26pt" style:font-size-complex="26pt" style:language-complex="hi" style:country-complex="IN" fo:font-style="normal" fo:font-weight="normal"/>
    </style:style>
    <style:style style:family="text" style:name="T510">
      <style:text-properties fo:color="#376092" fo:font-family="DejaVu Math TeX Gyre" style:font-family-complex="DejaVu Math TeX Gyre" fo:font-size="26pt" style:font-size-complex="26pt" style:language-complex="hi" style:country-complex="IN" fo:font-style="normal" fo:font-weight="normal"/>
    </style:style>
    <style:style style:family="text" style:name="T511">
      <style:text-properties fo:color="#376092" fo:font-family="DejaVu Math TeX Gyre" style:font-family-complex="DejaVu Math TeX Gyre" fo:font-size="72pt" style:font-size-complex="72pt" style:language-complex="hi" style:country-complex="IN" fo:font-style="normal" fo:font-weight="normal"/>
    </style:style>
    <style:style style:family="text" style:name="T512">
      <style:text-properties fo:color="#376092" fo:font-family="Arial" style:font-family-complex="Arial" fo:font-size="26pt" style:font-size-complex="26pt" style:language-complex="hi" style:country-complex="IN" fo:font-style="normal" fo:font-weight="normal"/>
    </style:style>
    <style:style style:family="text" style:name="T513">
      <style:text-properties fo:color="#376092" fo:font-family="Arial" style:font-family-complex="Arial" fo:font-size="26pt" style:font-size-complex="26pt" style:language-complex="hi" style:country-complex="IN" fo:font-style="normal" fo:font-weight="normal"/>
    </style:style>
    <style:style style:parent-style-name="766" style:family="paragraph" style:name="P44">
      <style:paragraph-properties fo:line-height="65%" fo:text-align="left" fo:margin-left="0cm" fo:margin-right="0cm" fo:text-indent="0cm"/>
      <style:text-properties fo:color="#000000" fo:font-family="Arial" style:font-family-complex="Arial" fo:font-size="26pt" style:font-size-complex="26pt" style:language-complex="hi" style:country-complex="IN" fo:font-style="normal" fo:font-weight="normal"/>
    </style:style>
    <style:style style:family="text" style:name="T514">
      <style:text-properties fo:color="#376092" fo:font-family="DejaVu Math TeX Gyre" style:font-family-complex="DejaVu Math TeX Gyre" fo:font-size="72pt" style:font-size-complex="72pt" style:language-complex="hi" style:country-complex="IN" fo:font-style="normal" fo:font-weight="normal"/>
    </style:style>
    <style:style style:family="text" style:name="T515">
      <style:text-properties fo:color="#376092" fo:font-family="Arial" style:font-family-complex="Arial" fo:font-size="26pt" style:font-size-complex="26pt" style:language-complex="hi" style:country-complex="IN" fo:font-style="normal" fo:font-weight="normal"/>
    </style:style>
    <style:style style:family="text" style:name="T516">
      <style:text-properties fo:color="#376092" fo:font-family="Arial" style:font-family-complex="Arial" fo:font-size="26pt" style:font-size-complex="26pt" style:language-complex="hi" style:country-complex="IN" fo:font-style="normal" fo:font-weight="normal"/>
    </style:style>
    <style:style style:parent-style-name="766" style:family="paragraph" style:name="P45">
      <style:paragraph-properties fo:line-height="87.0833%" fo:text-align="left" fo:margin-left="0cm" fo:margin-right="0cm" fo:text-indent="0cm"/>
      <style:text-properties fo:color="#000000" fo:font-family="Arial" style:font-family-complex="Arial" fo:font-size="26pt" style:font-size-complex="26pt" style:language-complex="hi" style:country-complex="IN" fo:font-style="normal" fo:font-weight="normal"/>
    </style:style>
    <style:style style:family="text" style:name="T517">
      <style:text-properties fo:color="#bfbfbf" fo:font-family="DejaVu Math TeX Gyre" style:font-family-complex="DejaVu Math TeX Gyre" fo:font-size="72pt" style:font-size-complex="72pt" style:language-complex="hi" style:country-complex="IN" fo:font-style="normal" fo:font-weight="normal"/>
    </style:style>
    <style:style style:family="text" style:name="T518">
      <style:text-properties fo:color="#bfbfbf" fo:font-family="DejaVu Serif Condensed" style:font-family-complex="DejaVu Serif Condensed" fo:font-size="36pt" style:font-size-complex="36pt" style:language-complex="hi" style:country-complex="IN" fo:font-style="normal" fo:font-weight="normal"/>
    </style:style>
    <style:style style:family="text" style:name="T519">
      <style:text-properties fo:color="#bfbfbf" fo:font-family="DejaVu Serif Condensed" style:font-family-complex="DejaVu Serif Condensed" fo:font-size="36pt" style:font-size-complex="36pt" fo:language="en" style:language-complex="hi" fo:country="IN" style:country-complex="IN" fo:font-style="normal" fo:font-weight="normal"/>
    </style:style>
    <style:style style:family="text" style:name="T520">
      <style:text-properties fo:color="#bfbfbf" fo:font-family="DejaVu Serif Condensed" style:font-family-complex="DejaVu Serif Condensed" fo:font-size="36pt" style:font-size-complex="36pt" style:language-complex="hi" style:country-complex="IN" fo:font-style="normal" fo:font-weight="normal"/>
    </style:style>
    <style:style style:family="text" style:name="T521">
      <style:text-properties fo:color="#bfbfbf" fo:font-family="DejaVu Serif Condensed" style:font-family-complex="DejaVu Serif Condensed" fo:font-size="36pt" style:font-size-complex="36pt" style:language-complex="hi" style:country-complex="IN" fo:font-style="normal" fo:font-weight="normal"/>
    </style:style>
    <style:style style:family="text" style:name="T522">
      <style:text-properties fo:color="#bfbfbf" fo:font-family="DejaVu Serif Condensed" style:font-family-complex="DejaVu Serif Condensed" fo:font-size="36pt" style:font-size-complex="36pt" fo:language="en" style:language-complex="hi" fo:country="IN" style:country-complex="IN" fo:font-style="normal" fo:font-weight="normal"/>
    </style:style>
    <style:style style:family="text" style:name="T523">
      <style:text-properties fo:color="#bfbfbf" fo:font-family="DejaVu Serif Condensed" style:font-family-complex="DejaVu Serif Condensed" fo:font-size="36pt" style:font-size-complex="36pt" fo:language="en" style:language-complex="hi" fo:country="IN" style:country-complex="IN" fo:font-style="normal" fo:font-weight="normal"/>
    </style:style>
    <style:style style:family="text" style:name="T524">
      <style:text-properties fo:color="#bfbfbf" fo:font-family="Arial" style:font-family-complex="Arial" fo:font-size="26pt" style:font-size-complex="26pt" style:language-complex="hi" style:country-complex="IN" fo:font-style="normal" fo:font-weight="normal"/>
    </style:style>
    <style:style style:family="text" style:name="T525">
      <style:text-properties fo:color="#bfbfbf" fo:font-family="Arial" style:font-family-complex="Arial" fo:font-size="26pt" style:font-size-complex="26pt" style:language-complex="hi" style:country-complex="IN" fo:font-style="normal" fo:font-weight="normal"/>
    </style:style>
    <style:style style:parent-style-name="753" style:family="paragraph" style:name="P46">
      <style:paragraph-properties fo:line-height="80%"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26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27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28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47">
      <style:paragraph-properties fo:line-height="80%" fo:text-align="justify"/>
      <style:text-properties fo:color="#000000" fo:font-family="Arial" style:font-family-complex="Arial" fo:font-size="11pt" style:font-size-complex="11pt" style:language-complex="hi" style:country-complex="IN" fo:font-style="normal" fo:font-weight="normal"/>
    </style:style>
    <style:style style:family="text" style:name="T529">
      <style:text-properties fo:color="#376092" fo:font-family="Coolvetica Cond" style:font-family-asian="Coolvetica Cond" style:font-family-complex="Coolvetica Cond" fo:font-size="14pt" style:font-size-complex="14pt" style:language-complex="hi" style:country-complex="IN" fo:font-style="normal" fo:font-weight="normal"/>
    </style:style>
    <style:style style:family="text" style:name="T530">
      <style:text-properties fo:color="#376092" fo:font-family="Coolvetica Cond" style:font-family-asian="Coolvetica Cond" style:font-family-complex="Coolvetica Cond" fo:font-size="14pt" style:font-size-complex="14pt" fo:language="en" style:language-complex="hi" fo:country="IN" style:country-complex="IN" fo:font-style="normal" fo:font-weight="normal"/>
    </style:style>
    <style:style style:family="text" style:name="T531">
      <style:text-properties fo:color="#376092" fo:font-family="Coolvetica Cond" style:font-family-asian="Coolvetica Cond" style:font-family-complex="Coolvetica Cond" fo:font-size="14pt" style:font-size-complex="14pt" fo:language="en" style:language-complex="hi" fo:country="IN" style:country-complex="IN" fo:font-style="normal" fo:font-weight="normal"/>
    </style:style>
    <style:style style:family="text" style:name="T532">
      <style:text-properties fo:color="#376092" fo:font-family="Coolvetica Cond" style:font-family-asian="Coolvetica Cond" style:font-family-complex="Coolvetica Cond" fo:font-size="14pt" style:font-size-complex="14pt" style:language-complex="hi" style:country-complex="IN" fo:font-style="normal" fo:font-weight="normal"/>
    </style:style>
    <style:style style:family="text" style:name="T533">
      <style:text-properties fo:color="#376092" fo:font-family="Coolvetica Cond" style:font-family-asian="Coolvetica Cond" style:font-family-complex="Coolvetica Cond" fo:font-size="14pt" style:font-size-complex="14pt" fo:language="en" style:language-complex="hi" fo:country="IN" style:country-complex="IN" fo:font-style="normal" fo:font-weight="normal"/>
    </style:style>
    <style:style style:family="text" style:name="T534">
      <style:text-properties fo:color="#376092" fo:font-family="Coolvetica Cond" style:font-family-asian="Coolvetica Cond" style:font-family-complex="Coolvetica Cond" fo:font-size="14pt" style:font-size-complex="14pt" style:language-complex="hi" style:country-complex="IN" fo:font-style="normal" fo:font-weight="normal"/>
    </style:style>
    <style:style style:family="text" style:name="T535">
      <style:text-properties fo:color="#376092" fo:font-family="Coolvetica Cond" style:font-family-asian="Coolvetica Cond" style:font-family-complex="Coolvetica Cond" fo:font-size="14pt" style:font-size-complex="14pt" fo:language="en" style:language-complex="hi" fo:country="IN" style:country-complex="IN" fo:font-style="normal" fo:font-weight="normal"/>
    </style:style>
    <style:style style:family="text" style:name="T536">
      <style:text-properties fo:color="#376092" fo:font-family="Coolvetica Cond" style:font-family-asian="Coolvetica Cond" style:font-family-complex="Coolvetica Cond" fo:font-size="14pt" style:font-size-complex="14pt" style:language-complex="hi" style:country-complex="IN" fo:font-style="normal" fo:font-weight="normal"/>
    </style:style>
    <style:style style:family="text" style:name="T537">
      <style:text-properties fo:color="#376092" fo:font-family="Coolvetica Cond" style:font-family-asian="Coolvetica Cond" style:font-family-complex="Coolvetica Cond" fo:font-size="11pt" style:font-size-complex="11pt" style:language-complex="hi" style:country-complex="IN" fo:font-style="normal" fo:font-weight="normal"/>
    </style:style>
    <style:style style:family="text" style:name="T538">
      <style:text-properties fo:color="#376092" fo:font-family="Coolvetica Cond" style:font-family-asian="Coolvetica Cond" style:font-family-complex="Coolvetica Cond" fo:font-size="11pt" style:font-size-complex="11pt" style:language-complex="hi" style:country-complex="IN" fo:font-style="normal" fo:font-weight="normal"/>
    </style:style>
    <style:style style:parent-style-name="753" style:family="paragraph" style:name="P48">
      <style:paragraph-properties fo:line-height="80%" fo:text-align="justify"/>
      <style:text-properties fo:color="#000000" fo:font-family="Arial" style:font-family-complex="Arial" fo:font-size="11pt" style:font-size-complex="11pt" style:language-complex="hi" style:country-complex="IN" fo:font-style="italic" fo:font-weight="normal"/>
    </style:style>
    <style:style style:family="text" style:name="T539">
      <style:text-properties fo:color="#7f7f7f" fo:font-family="DejaVu Serif Condensed" style:font-family-complex="DejaVu Serif Condensed" fo:font-size="11pt" style:font-size-complex="11pt" style:language-complex="hi" style:country-complex="IN" fo:font-style="italic" fo:font-weight="normal"/>
    </style:style>
    <style:style style:family="text" style:name="T540">
      <style:text-properties fo:color="#7f7f7f" fo:font-family="Arial" style:font-family-complex="Arial" fo:font-size="11pt" style:font-size-complex="11pt" style:language-complex="hi" style:country-complex="IN" fo:font-style="italic" fo:font-weight="normal"/>
    </style:style>
    <style:style style:family="text" style:name="T541">
      <style:text-properties fo:color="#7f7f7f" fo:font-family="Arial" style:font-family-complex="Arial" fo:font-size="11pt" style:font-size-complex="11pt" style:language-complex="hi" style:country-complex="IN" fo:font-style="italic" fo:font-weight="normal"/>
    </style:style>
    <style:style style:parent-style-name="753" style:family="paragraph" style:name="P49">
      <style:paragraph-properties fo:line-height="80%"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4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43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44">
      <style:text-properties fo:color="#7f7f7f" fo:font-family="Arial" style:font-family-complex="Arial" fo:font-size="11pt" style:font-size-complex="11pt" style:language-complex="hi" style:country-complex="IN"/>
    </style:style>
    <style:style style:parent-style-name="760" style:family="paragraph" style:name="P50">
      <style:paragraph-properties fo:text-align="justify"/>
      <style:text-properties fo:color="#000000" fo:font-family="Arial" style:font-family-complex="Arial" fo:font-size="20pt" style:font-size-complex="20pt" style:language-complex="hi" style:country-complex="IN"/>
    </style:style>
    <style:style style:family="text" style:name="T545">
      <style:text-properties fo:color="#7f7f7f" fo:font-family="DejaVu Serif Condensed" style:font-family-complex="DejaVu Serif Condensed" fo:font-size="20pt" style:font-size-complex="20pt" style:language-complex="hi" style:country-complex="IN"/>
    </style:style>
    <style:style style:family="text" style:name="T546">
      <style:text-properties fo:color="#7f7f7f" fo:font-family="DejaVu Serif Condensed" style:font-family-complex="DejaVu Serif Condensed" fo:font-size="20pt" style:font-size-complex="20pt" style:language-complex="hi" style:country-complex="IN"/>
    </style:style>
    <style:style style:family="text" style:name="T547">
      <style:text-properties fo:color="#7f7f7f" fo:font-family="DejaVu Serif Condensed" style:font-family-complex="DejaVu Serif Condensed" fo:font-size="20pt" style:font-size-complex="20pt" style:language-complex="hi" style:country-complex="IN"/>
    </style:style>
    <style:style style:family="text" style:name="T548">
      <style:text-properties fo:color="#7f7f7f" fo:font-family="DejaVu Serif Condensed" style:font-family-complex="DejaVu Serif Condensed" fo:font-size="20pt" style:font-size-complex="20pt" style:language-complex="hi" style:country-complex="IN"/>
    </style:style>
    <style:style style:parent-style-name="753" style:family="paragraph" style:name="P51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4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50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51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52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5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53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54">
      <style:text-properties fo:color="#7f7f7f" fo:font-family="Arial" style:font-family-complex="Arial" fo:font-size="11pt" style:font-size-complex="11pt" style:language-complex="hi" style:country-complex="IN"/>
    </style:style>
    <style:style style:parent-style-name="760" style:family="paragraph" style:name="P53">
      <style:paragraph-properties fo:text-align="justify"/>
      <style:text-properties fo:color="#000000" fo:font-family="Arial" style:font-family-complex="Arial" fo:font-size="20pt" style:font-size-complex="20pt" style:language-complex="hi" style:country-complex="IN" fo:font-weight="bold"/>
    </style:style>
    <style:style style:family="text" style:name="T555">
      <style:text-properties fo:color="#7f7f7f" fo:font-family="DejaVu Serif Condensed" style:font-family-complex="DejaVu Serif Condensed" fo:font-size="20pt" style:font-size-complex="20pt" style:language-complex="hi" style:country-complex="IN" fo:font-weight="bold"/>
    </style:style>
    <style:style style:family="text" style:name="T556">
      <style:text-properties fo:color="#7f7f7f" fo:font-family="DejaVu Serif Condensed" style:font-family-complex="DejaVu Serif Condensed" fo:font-size="20pt" style:font-size-complex="20pt" style:language-complex="hi" style:country-complex="IN" fo:font-weight="bold"/>
    </style:style>
    <style:style style:family="text" style:name="T557">
      <style:text-properties fo:color="#7f7f7f" fo:font-family="DejaVu Serif Condensed" style:font-family-complex="DejaVu Serif Condensed" fo:font-size="20pt" style:font-size-complex="20pt" style:language-complex="hi" style:country-complex="IN" fo:font-weight="bold"/>
    </style:style>
    <style:style style:parent-style-name="760" style:family="paragraph" style:name="P54">
      <style:paragraph-properties fo:text-align="justify"/>
      <style:text-properties fo:color="#000000" fo:font-family="Arial" style:font-family-complex="Arial" fo:font-size="20pt" style:font-size-complex="20pt" style:language-complex="hi" style:country-complex="IN" fo:font-weight="bold"/>
    </style:style>
    <style:style style:family="text" style:name="T558">
      <style:text-properties fo:color="#7f7f7f" fo:font-family="DejaVu Serif Condensed" style:font-family-complex="DejaVu Serif Condensed" fo:font-size="20pt" style:font-size-complex="20pt" style:language-complex="hi" style:country-complex="IN" fo:font-weight="bold"/>
    </style:style>
    <style:style style:family="text" style:name="T559">
      <style:text-properties fo:color="#7f7f7f" fo:font-family="DejaVu Serif Condensed" style:font-family-complex="DejaVu Serif Condensed" fo:font-size="20pt" style:font-size-complex="20pt" style:language-complex="hi" style:country-complex="IN" fo:font-weight="bold"/>
    </style:style>
    <style:style style:family="text" style:name="T560">
      <style:text-properties fo:color="#7f7f7f" fo:font-family="DejaVu Serif Condensed" style:font-family-complex="DejaVu Serif Condensed" fo:font-size="20pt" style:font-size-complex="20pt" style:language-complex="hi" style:country-complex="IN" fo:font-weight="bold"/>
    </style:style>
    <style:style style:parent-style-name="753" style:family="paragraph" style:name="P55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61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62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63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56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64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65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66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57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67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68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69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58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70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71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72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59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73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74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75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60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76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77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78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61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7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80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81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62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8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83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84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63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85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586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587">
      <style:text-properties fo:color="#7f7f7f" fo:font-family="Arial" style:font-family-complex="Arial" fo:font-size="11pt" style:font-size-complex="11pt" style:language-complex="hi" style:country-complex="IN"/>
    </style:style>
    <style:style style:parent-style-name="760" style:family="paragraph" style:name="P64">
      <style:paragraph-properties fo:text-align="justify"/>
      <style:text-properties fo:color="#000000" fo:font-family="Arial" style:font-family-complex="Arial" fo:font-size="20pt" style:font-size-complex="20pt" style:language-complex="hi" style:country-complex="IN" fo:font-style="italic"/>
    </style:style>
    <style:style style:family="text" style:name="T588">
      <style:text-properties fo:color="#7f7f7f" fo:font-family="DejaVu Serif Condensed" style:font-family-complex="DejaVu Serif Condensed" fo:font-size="20pt" style:font-size-complex="20pt" style:language-complex="hi" style:country-complex="IN" fo:font-style="italic"/>
    </style:style>
    <style:style style:family="text" style:name="T589">
      <style:text-properties fo:color="#7f7f7f" fo:font-family="DejaVu Serif Condensed" style:font-family-complex="DejaVu Serif Condensed" fo:font-size="20pt" style:font-size-complex="20pt" style:language-complex="hi" style:country-complex="IN" fo:font-style="italic"/>
    </style:style>
    <style:style style:family="text" style:name="T590">
      <style:text-properties fo:color="#7f7f7f" fo:font-family="DejaVu Serif Condensed" style:font-family-complex="DejaVu Serif Condensed" fo:font-size="20pt" style:font-size-complex="20pt" style:language-complex="hi" style:country-complex="IN" fo:font-style="italic"/>
    </style:style>
    <style:style style:parent-style-name="760" style:family="paragraph" style:name="P65">
      <style:paragraph-properties fo:text-align="justify"/>
      <style:text-properties fo:color="#000000" fo:font-family="Arial" style:font-family-complex="Arial" fo:font-size="20pt" style:font-size-complex="20pt" style:language-complex="hi" style:country-complex="IN" fo:font-style="italic"/>
    </style:style>
    <style:style style:family="text" style:name="T591">
      <style:text-properties fo:color="#000000" fo:font-family="DejaVu Serif Condensed" style:font-family-complex="DejaVu Serif Condensed" fo:font-size="20pt" style:font-size-complex="20pt" fo:language="en" style:language-complex="hi" fo:country="IN" style:country-complex="IN" fo:font-style="italic"/>
    </style:style>
    <style:style style:family="text" style:name="T592">
      <style:text-properties fo:color="#000000" fo:font-family="DejaVu Serif Condensed" style:font-family-complex="DejaVu Serif Condensed" fo:font-size="20pt" style:font-size-complex="20pt" fo:language="en" style:language-complex="hi" fo:country="IN" style:country-complex="IN" fo:font-style="italic"/>
    </style:style>
    <style:style style:family="text" style:name="T593">
      <style:text-properties fo:color="#000000" fo:font-family="DejaVu Serif Condensed" style:font-family-complex="DejaVu Serif Condensed" fo:font-size="20pt" style:font-size-complex="20pt" fo:language="en" style:language-complex="hi" fo:country="IN" style:country-complex="IN" fo:font-style="italic"/>
    </style:style>
    <style:style style:family="text" style:name="T594">
      <style:text-properties fo:color="#000000" fo:font-family="DejaVu Serif Condensed" style:font-family-complex="DejaVu Serif Condensed" fo:font-size="20pt" style:font-size-complex="20pt" fo:language="en" style:language-complex="hi" fo:country="IN" style:country-complex="IN" fo:font-style="italic"/>
    </style:style>
    <style:style style:parent-style-name="761" style:family="paragraph" style:name="P66">
      <style:paragraph-properties fo:text-align="justify"/>
      <style:text-properties fo:color="#000000" fo:font-family="Arial" style:font-family-complex="Arial" fo:font-size="16pt" style:font-size-complex="16pt" style:language-complex="hi" style:country-complex="IN" fo:font-weight="normal"/>
    </style:style>
    <style:style style:family="text" style:name="T595">
      <style:text-properties fo:color="#7f7f7f" fo:font-family="DejaVu Serif Condensed" style:font-family-complex="DejaVu Serif Condensed" fo:font-size="16pt" style:font-size-complex="16pt" style:language-complex="hi" style:country-complex="IN" fo:font-weight="normal"/>
    </style:style>
    <style:style style:family="text" style:name="T596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597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598">
      <style:text-properties fo:color="#7f7f7f" fo:font-family="DejaVu Serif Condensed" style:font-family-complex="DejaVu Serif Condensed" fo:font-size="16pt" style:font-size-complex="16pt" style:language-complex="hi" style:country-complex="IN" fo:font-weight="normal"/>
    </style:style>
    <style:style style:parent-style-name="753" style:family="paragraph" style:name="P67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9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00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01">
      <style:text-properties fo:color="#7f7f7f" fo:font-family="Arial" style:font-family-complex="Arial" fo:font-size="11pt" style:font-size-complex="11pt" style:language-complex="hi" style:country-complex="IN"/>
    </style:style>
    <style:style style:parent-style-name="761" style:family="paragraph" style:name="P68">
      <style:paragraph-properties fo:text-align="justify"/>
      <style:text-properties fo:color="#000000" fo:font-family="Arial" style:font-family-complex="Arial" fo:font-size="16pt" style:font-size-complex="16pt" style:language-complex="hi" style:country-complex="IN" fo:font-weight="normal"/>
    </style:style>
    <style:style style:family="text" style:name="T602">
      <style:text-properties fo:color="#7f7f7f" fo:font-family="DejaVu Serif Condensed" style:font-family-complex="DejaVu Serif Condensed" fo:font-size="16pt" style:font-size-complex="16pt" style:language-complex="hi" style:country-complex="IN" fo:font-weight="normal"/>
    </style:style>
    <style:style style:family="text" style:name="T603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604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605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parent-style-name="753" style:list-style-name="WWNum9" style:family="paragraph" style:name="P69">
      <style:paragraph-properties fo:text-align="justify" fo:margin-left="1.27cm" fo:margin-right="0cm" fo:text-indent="-0.635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06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07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08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parent-style-name="753" style:list-style-name="WWNum9" style:family="paragraph" style:name="P70">
      <style:paragraph-properties fo:text-align="justify" fo:margin-left="1.27cm" fo:margin-right="0cm" fo:text-indent="-0.635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0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10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11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parent-style-name="753" style:list-style-name="WWNum9" style:family="paragraph" style:name="P71">
      <style:paragraph-properties fo:text-align="justify" fo:margin-left="1.27cm" fo:margin-right="0cm" fo:text-indent="-0.635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1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13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14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parent-style-name="761" style:family="paragraph" style:name="P72">
      <style:paragraph-properties fo:text-align="justify"/>
      <style:text-properties fo:color="#000000" fo:font-family="Arial" style:font-family-complex="Arial" fo:font-size="16pt" style:font-size-complex="16pt" style:language-complex="hi" style:country-complex="IN" fo:font-weight="normal"/>
    </style:style>
    <style:style style:family="text" style:name="T615">
      <style:text-properties fo:color="#7f7f7f" fo:font-family="DejaVu Serif Condensed" style:font-family-complex="DejaVu Serif Condensed" fo:font-size="16pt" style:font-size-complex="16pt" style:language-complex="hi" style:country-complex="IN" fo:font-weight="normal"/>
    </style:style>
    <style:style style:family="text" style:name="T616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617">
      <style:text-properties fo:color="#376092" fo:font-family="Coolvetica Cond" style:font-family-asian="Coolvetica Cond" style:font-family-complex="Coolvetica Cond" fo:font-size="22pt" style:font-size-complex="22pt" fo:language="en" style:language-complex="hi" fo:country="IN" style:country-complex="IN" fo:font-weight="normal"/>
    </style:style>
    <style:style style:family="text" style:name="T618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619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paragraph" style:name="P73">
      <style:paragraph-properties/>
      <style:text-properties fo:color="#7f7f7f"/>
    </style:style>
    <style:style style:family="text" style:name="T620">
      <style:text-properties fo:color="#7f7f7f" fo:font-family="DejaVu Serif Condensed" style:font-family-complex="DejaVu Serif Condensed" fo:font-size="16pt" style:font-size-complex="16pt" fo:language="en" fo:country="IN" fo:font-weight="normal"/>
    </style:style>
    <style:style style:family="text" style:name="T621">
      <style:text-properties fo:color="#7f7f7f" fo:font-family="DejaVu Serif Condensed" style:font-family-complex="DejaVu Serif Condensed" fo:font-size="16pt" style:font-size-complex="16pt" fo:font-weight="normal"/>
    </style:style>
    <style:style style:family="text" style:name="T622">
      <style:text-properties fo:color="#7f7f7f"/>
    </style:style>
    <style:style style:family="paragraph" style:name="P74">
      <style:paragraph-properties fo:text-align="justify"/>
      <style:text-properties fo:color="#7f7f7f" fo:font-family="DejaVu Serif Condensed" style:font-family-complex="DejaVu Serif Condensed" fo:font-size="11pt" style:font-size-complex="11pt" fo:font-style="italic" fo:font-weight="bold"/>
    </style:style>
    <style:style style:family="text" style:name="T623">
      <style:text-properties fo:color="#7f7f7f" fo:font-family="DejaVu Serif Condensed" style:font-family-complex="DejaVu Serif Condensed" fo:font-size="16pt" style:font-size-complex="16pt" fo:language="en" style:language-complex="hi" fo:country="IN" style:country-complex="IN" fo:font-style="italic" fo:font-weight="normal"/>
    </style:style>
    <style:style style:family="text" style:name="T624">
      <style:text-properties fo:color="#376092" fo:font-family="Coolvetica Cond" style:font-family-asian="Coolvetica Cond" style:font-family-complex="Coolvetica Cond" fo:font-size="16pt" style:font-size-complex="16pt" fo:language="en" fo:country="IN" fo:font-style="normal" fo:font-weight="normal"/>
    </style:style>
    <style:style style:family="text" style:name="T625">
      <style:text-properties fo:color="#376092" fo:font-family="Coolvetica Cond" style:font-family-asian="Coolvetica Cond" style:font-family-complex="Coolvetica Cond" fo:font-size="16pt" style:font-size-complex="16pt" fo:language="en" style:language-complex="hi" fo:country="IN" style:country-complex="IN" fo:font-style="normal" fo:font-weight="normal"/>
    </style:style>
    <style:style style:family="text" style:name="T626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bold"/>
    </style:style>
    <style:style style:family="text" style:name="T627">
      <style:text-properties fo:color="#7f7f7f" fo:font-family="DejaVu Serif Condensed" style:font-family-complex="DejaVu Serif Condensed" fo:font-size="11pt" style:font-size-complex="11pt" fo:language="en" fo:country="IN" fo:font-style="italic" fo:font-weight="bold"/>
    </style:style>
    <style:style style:family="text" style:name="T628">
      <style:text-properties fo:color="#7f7f7f" fo:font-family="DejaVu Serif Condensed" style:font-family-complex="DejaVu Serif Condensed" fo:font-size="11pt" style:font-size-complex="11pt" fo:language="en" fo:country="IN" fo:font-style="italic" fo:font-weight="bold"/>
    </style:style>
    <style:style style:family="text" style:name="T629">
      <style:text-properties fo:color="#7f7f7f" fo:font-family="DejaVu Serif Condensed" style:font-family-complex="DejaVu Serif Condensed" fo:font-size="11pt" style:font-size-complex="11pt" fo:language="en" fo:country="IN" fo:font-style="italic" fo:font-weight="bold"/>
    </style:style>
    <style:style style:family="paragraph" style:name="P75">
      <style:paragraph-properties fo:text-align="justify"/>
      <style:text-properties fo:color="#7f7f7f" fo:font-family="DejaVu Serif Condensed" style:font-family-complex="DejaVu Serif Condensed" fo:font-size="11pt" style:font-size-complex="11pt" fo:font-style="italic" fo:font-weight="bold"/>
    </style:style>
    <style:style style:family="text" style:name="T630">
      <style:text-properties fo:color="#7f7f7f" fo:font-family="DejaVu Serif Condensed" style:font-family-complex="DejaVu Serif Condensed" fo:font-size="11pt" style:font-size-complex="11pt" fo:language="en" fo:country="IN" fo:font-style="italic" fo:font-weight="bold"/>
    </style:style>
    <style:style style:family="text" style:name="T631">
      <style:text-properties fo:color="#7f7f7f" fo:font-family="DejaVu Serif Condensed" style:font-family-complex="DejaVu Serif Condensed" fo:font-size="11pt" style:font-size-complex="11pt" fo:font-style="italic" fo:font-weight="bold"/>
    </style:style>
    <style:style style:family="text" style:name="T632">
      <style:text-properties fo:color="#7f7f7f" fo:font-family="DejaVu Serif Condensed" style:font-family-complex="DejaVu Serif Condensed" fo:font-size="11pt" style:font-size-complex="11pt" fo:font-style="italic" fo:font-weight="bold"/>
    </style:style>
    <style:style style:parent-style-name="753" style:family="paragraph" style:name="P76">
      <style:paragraph-properties fo:text-align="justify" fo:margin-left="1.251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33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34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635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36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37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38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3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40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41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77">
      <style:paragraph-properties fo:text-align="justify" fo:margin-left="1.251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42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43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644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45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46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78">
      <style:paragraph-properties fo:text-align="justify" fo:margin-left="1.251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47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48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64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50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51">
      <style:text-properties fo:color="#7f7f7f" fo:font-family="Arial" style:font-family-complex="Arial" fo:font-size="11pt" style:font-size-complex="11pt" style:language-complex="hi" style:country-complex="IN"/>
    </style:style>
    <style:style style:parent-style-name="762" style:family="paragraph" style:name="P79">
      <style:paragraph-properties fo:text-align="justify"/>
      <style:text-properties fo:color="#434343" fo:font-family="Arial" style:font-family-complex="Arial" fo:font-size="14pt" style:font-size-complex="14pt" style:language-complex="hi" style:country-complex="IN" fo:font-style="italic" fo:font-weight="normal"/>
    </style:style>
    <style:style style:family="text" style:name="T652">
      <style:text-properties fo:color="#376092" fo:font-family="Coolvetica Cond" style:font-family-asian="Coolvetica Cond" style:font-family-complex="Coolvetica Cond" fo:font-size="16pt" style:font-size-complex="16pt" fo:language="en" style:language-complex="hi" fo:country="IN" style:country-complex="IN" fo:font-style="normal" fo:font-weight="normal"/>
    </style:style>
    <style:style style:family="text" style:name="T653">
      <style:text-properties fo:color="#376092" fo:font-family="Coolvetica Cond" style:font-family-asian="Coolvetica Cond" style:font-family-complex="Coolvetica Cond" fo:font-size="16pt" style:font-size-complex="16pt" fo:language="en" style:language-complex="hi" fo:country="IN" style:country-complex="IN" fo:font-style="normal" fo:font-weight="normal"/>
    </style:style>
    <style:style style:family="text" style:name="T654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bold"/>
    </style:style>
    <style:style style:family="text" style:name="T655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normal"/>
    </style:style>
    <style:style style:family="text" style:name="T656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bold"/>
    </style:style>
    <style:style style:family="text" style:name="T657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bold"/>
    </style:style>
    <style:style style:family="paragraph" style:name="P80">
      <style:paragraph-properties/>
      <style:text-properties fo:color="#7f7f7f"/>
    </style:style>
    <style:style style:family="text" style:name="T658">
      <style:text-properties fo:color="#7f7f7f" fo:font-family="DejaVu Serif Condensed" style:font-family-complex="DejaVu Serif Condensed" fo:font-size="11pt" style:font-size-complex="11pt" style:language-complex="hi" style:country-complex="IN" fo:font-style="italic" fo:font-weight="normal"/>
    </style:style>
    <style:style style:family="text" style:name="T659">
      <style:text-properties fo:color="#7f7f7f" fo:font-family="DejaVu Serif Condensed" style:font-family-complex="DejaVu Serif Condensed" fo:font-size="11pt" style:font-size-complex="11pt" style:language-complex="hi" style:country-complex="IN" fo:font-style="italic" fo:font-weight="normal"/>
    </style:style>
    <style:style style:family="text" style:name="T660">
      <style:text-properties fo:color="#7f7f7f"/>
    </style:style>
    <style:style style:parent-style-name="753" style:family="paragraph" style:name="P81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61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6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63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64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82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65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66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67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68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83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69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70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71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67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73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74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75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84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76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77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78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79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85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80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81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82">
      <style:text-properties fo:color="#7f7f7f" fo:font-family="Arial" style:font-family-complex="Arial" fo:font-size="11pt" style:font-size-complex="11pt" style:language-complex="hi" style:country-complex="IN"/>
    </style:style>
    <style:style style:parent-style-name="761" style:family="paragraph" style:name="P86">
      <style:paragraph-properties fo:text-align="justify"/>
      <style:text-properties fo:color="#000000" fo:font-family="Arial" style:font-family-complex="Arial" fo:font-size="16pt" style:font-size-complex="16pt" style:language-complex="hi" style:country-complex="IN" fo:font-weight="normal"/>
    </style:style>
    <style:style style:family="text" style:name="T683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684">
      <style:text-properties fo:color="#376092" fo:font-family="Coolvetica Cond" style:font-family-asian="Coolvetica Cond" style:font-family-complex="Coolvetica Cond" fo:font-size="22pt" style:font-size-complex="22pt" fo:language="en" style:language-complex="hi" fo:country="IN" style:country-complex="IN" fo:font-weight="normal"/>
    </style:style>
    <style:style style:family="text" style:name="T685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family="text" style:name="T686">
      <style:text-properties fo:color="#376092" fo:font-family="Coolvetica Cond" style:font-family-asian="Coolvetica Cond" style:font-family-complex="Coolvetica Cond" fo:font-size="22pt" style:font-size-complex="22pt" style:language-complex="hi" style:country-complex="IN" fo:font-weight="normal"/>
    </style:style>
    <style:style style:parent-style-name="753" style:family="paragraph" style:name="P87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87">
      <style:text-properties fo:color="#376092" fo:font-family="Coolvetica Cond" style:font-family-asian="Coolvetica Cond" style:font-family-complex="Coolvetica Cond" fo:font-size="16pt" style:font-size-complex="16pt" fo:language="en" style:language-complex="hi" fo:country="IN" style:country-complex="IN" fo:font-weight="normal"/>
    </style:style>
    <style:style style:family="text" style:name="T688">
      <style:text-properties fo:color="#7f7f7f" fo:font-family="DejaVu Serif Condensed" style:font-family-complex="DejaVu Serif Condensed" fo:font-size="11pt" style:font-size-complex="11pt" style:language-complex="hi" style:country-complex="IN" fo:font-style="italic" fo:font-weight="bold"/>
    </style:style>
    <style:style style:family="text" style:name="T689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690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bold"/>
    </style:style>
    <style:style style:family="text" style:name="T691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92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693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694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695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88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96">
      <style:text-properties fo:color="#376092" fo:font-family="Coolvetica Cond" style:font-family-asian="Coolvetica Cond" style:font-family-complex="Coolvetica Cond" fo:font-size="16pt" style:font-size-complex="16pt" fo:language="en" style:language-complex="hi" fo:country="IN" style:country-complex="IN" fo:font-weight="normal"/>
    </style:style>
    <style:style style:family="text" style:name="T697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698">
      <style:text-properties fo:color="#7f7f7f" fo:font-family="DejaVu Serif Condensed" style:font-family-complex="DejaVu Serif Condensed" fo:font-size="11pt" style:font-size-complex="11pt" style:language-complex="hi" style:country-complex="IN" fo:font-style="italic" fo:font-weight="bold"/>
    </style:style>
    <style:style style:family="text" style:name="T69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00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701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02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03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89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04">
      <style:text-properties fo:color="#376092" fo:font-family="Coolvetica Cond" style:font-family-asian="Coolvetica Cond" style:font-family-complex="Coolvetica Cond" fo:font-size="16pt" style:font-size-complex="16pt" fo:language="en" style:language-complex="hi" fo:country="IN" style:country-complex="IN" fo:font-weight="normal"/>
    </style:style>
    <style:style style:family="text" style:name="T705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bold"/>
    </style:style>
    <style:style style:family="text" style:name="T706">
      <style:text-properties fo:color="#7f7f7f" fo:font-family="DejaVu Serif Condensed" style:font-family-complex="DejaVu Serif Condensed" fo:font-size="11pt" style:font-size-complex="11pt" style:language-complex="hi" style:country-complex="IN" fo:font-style="italic" fo:font-weight="bold"/>
    </style:style>
    <style:style style:family="text" style:name="T707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08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70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10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711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12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13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90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14">
      <style:text-properties fo:color="#376092" fo:font-family="Coolvetica Cond" style:font-family-asian="Coolvetica Cond" style:font-family-complex="Coolvetica Cond" fo:font-size="16pt" style:font-size-complex="16pt" fo:language="en" style:language-complex="hi" fo:country="IN" style:country-complex="IN" fo:font-weight="normal"/>
    </style:style>
    <style:style style:family="text" style:name="T715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weight="bold"/>
    </style:style>
    <style:style style:family="text" style:name="T716">
      <style:text-properties fo:color="#7f7f7f" fo:font-family="DejaVu Serif Condensed" style:font-family-complex="DejaVu Serif Condensed" fo:font-size="11pt" style:font-size-complex="11pt" style:language-complex="hi" style:country-complex="IN" fo:font-style="italic" fo:font-weight="bold"/>
    </style:style>
    <style:style style:family="text" style:name="T717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18">
      <style:text-properties fo:color="#7f7f7f" fo:font-family="Arial" style:font-family-complex="Arial" fo:font-size="11pt" style:font-size-complex="11pt"/>
    </style:style>
    <style:style style:parent-style-name="753" style:family="paragraph" style:name="P91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19">
      <style:text-properties fo:color="#7f7f7f" fo:font-family="Arial" style:font-family-complex="Arial" fo:font-size="11pt" style:font-size-complex="11pt"/>
    </style:style>
    <style:style style:family="text" style:name="T720">
      <style:text-properties fo:color="#7f7f7f" fo:font-family="Arial" style:font-family-complex="Arial" fo:font-size="11pt" style:font-size-complex="11pt"/>
    </style:style>
    <style:style style:family="text" style:name="T721">
      <style:text-properties fo:color="#7f7f7f" fo:font-family="Arial" style:font-family-complex="Arial" fo:font-size="11pt" style:font-size-complex="11pt"/>
    </style:style>
    <style:style style:parent-style-name="753" style:family="paragraph" style:name="P92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2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23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24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parent-style-name="753" style:family="paragraph" style:name="P93">
      <style:paragraph-properties fo:text-align="justify" fo:margin-left="0cm" fo:margin-right="0cm" fo:text-indent="0cm"/>
      <style:text-properties fo:color="#000000" fo:font-family="Arial" style:font-family-asian="Coolvetica Cond" style:font-family-complex="Arial" fo:font-size="11pt" style:font-size-complex="11pt" fo:language="en" style:language-complex="hi" fo:country="IN" style:country-complex="IN"/>
    </style:style>
    <style:style style:family="text" style:name="T725">
      <style:text-properties fo:color="#376092" fo:font-family="Coolvetica Cond" style:font-family-asian="Coolvetica Cond" style:font-family-complex="Coolvetica Cond" fo:font-size="36pt" style:font-size-complex="36pt" fo:language="en" fo:country="IN"/>
    </style:style>
    <style:style style:family="text" style:name="T726">
      <style:text-properties fo:color="#376092" fo:font-family="Coolvetica Cond" style:font-family-complex="Coolvetica Cond" fo:font-size="90pt" style:font-size-complex="90pt" fo:language="en" fo:country="IN"/>
    </style:style>
    <style:style style:family="text" style:name="T727">
      <style:text-properties fo:color="#376092" fo:font-family="Coolvetica Cond" style:font-family-complex="Coolvetica Cond" fo:font-size="90pt" style:font-size-complex="90pt"/>
    </style:style>
    <style:style style:family="text" style:name="T728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29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30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31">
      <style:text-properties fo:color="#376092" fo:font-family="Coolvetica Cond" style:font-family-complex="Coolvetica Cond" fo:font-size="90pt" style:font-size-complex="90pt"/>
    </style:style>
    <style:style style:parent-style-name="753" style:family="paragraph" style:name="P94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3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33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34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95">
      <style:paragraph-properties fo:text-align="justify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35">
      <style:text-properties fo:color="#0d0c38" fo:font-family="DejaVu Serif Condensed" style:font-family-complex="DejaVu Serif Condensed" fo:font-size="16pt" style:font-size-complex="16pt" fo:language="en" style:language-complex="hi" fo:country="IN" style:country-complex="IN" fo:font-style="italic"/>
    </style:style>
    <style:style style:family="text" style:name="T736">
      <style:text-properties fo:color="#0d0c38" fo:font-family="DejaVu Serif Condensed" style:font-family-complex="DejaVu Serif Condensed" fo:font-size="16pt" style:font-size-complex="16pt" style:language-complex="hi" style:country-complex="IN" fo:font-style="italic"/>
    </style:style>
    <style:style style:family="text" style:name="T737">
      <style:text-properties fo:color="#0d0c38" fo:font-family="DejaVu Serif Condensed" style:font-family-complex="DejaVu Serif Condensed" fo:font-size="16pt" style:font-size-complex="16pt" style:language-complex="hi" style:country-complex="IN" fo:font-style="italic"/>
    </style:style>
    <style:style style:family="text" style:name="T738">
      <style:text-properties fo:color="#0d0c38" fo:font-family="Arial" style:font-family-complex="Arial" fo:font-size="11pt" style:font-size-complex="11pt" style:language-complex="hi" style:country-complex="IN" fo:font-style="italic"/>
    </style:style>
    <style:style style:family="text" style:name="T739">
      <style:text-properties fo:color="#0d0c38" fo:font-family="Arial" style:font-family-complex="Arial" fo:font-size="11pt" style:font-size-complex="11pt" style:language-complex="hi" style:country-complex="IN" fo:font-style="italic"/>
    </style:style>
    <style:style style:parent-style-name="753" style:family="paragraph" style:name="P96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40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41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42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list-style-name="WWNum1" style:family="paragraph" style:name="P97">
      <style:paragraph-properties fo:text-align="justify" fo:margin-left="1.27cm" fo:margin-right="0cm" fo:text-indent="-0.635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43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44">
      <style:text-properties fo:color="#7f7f7f" fo:font-family="DejaVu Serif Condensed" style:font-family-complex="DejaVu Serif Condensed" fo:font-size="18pt" style:font-size-complex="18pt" style:language-complex="hi" style:country-complex="IN"/>
    </style:style>
    <style:style style:family="text" style:name="T745">
      <style:text-properties fo:color="#7f7f7f" fo:font-family="DejaVu Serif Condensed" style:font-family-complex="DejaVu Serif Condensed" fo:font-size="18pt" style:font-size-complex="18pt" style:language-complex="hi" style:country-complex="IN"/>
    </style:style>
    <style:style style:family="text" style:name="T746">
      <style:text-properties fo:color="#7f7f7f" fo:font-family="DejaVu Serif Condensed" style:font-family-complex="DejaVu Serif Condensed" fo:font-size="18pt" style:font-size-complex="18pt" style:language-complex="hi" style:country-complex="IN"/>
    </style:style>
    <style:style style:parent-style-name="753" style:list-style-name="WWNum1" style:family="paragraph" style:name="P98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47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48">
      <style:text-properties fo:color="#376092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49">
      <style:text-properties fo:color="#376092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50">
      <style:text-properties fo:color="#376092" fo:font-family="DejaVu Serif Condensed" style:font-family-complex="DejaVu Serif Condensed" fo:font-size="11pt" style:font-size-complex="11pt" style:language-complex="hi" style:country-complex="IN" fo:font-style="italic"/>
    </style:style>
    <style:style style:parent-style-name="753" style:list-style-name="WWNum1" style:family="paragraph" style:name="P99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51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52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53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parent-style-name="753" style:list-style-name="WWNum1" style:family="paragraph" style:name="P100">
      <style:paragraph-properties fo:text-align="justify" fo:margin-left="1.27cm" fo:margin-right="0cm" fo:text-indent="-0.635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54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55">
      <style:text-properties fo:color="#376092" fo:font-family="Coolvetica Cond" style:font-family-asian="Coolvetica Cond" style:font-family-complex="Coolvetica Cond" fo:font-size="18pt" style:font-size-complex="18pt" fo:language="en" style:language-complex="hi" fo:country="IN" style:country-complex="IN"/>
    </style:style>
    <style:style style:family="text" style:name="T756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57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58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parent-style-name="753" style:list-style-name="WWNum1" style:family="paragraph" style:name="P101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59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60">
      <style:text-properties fo:color="#376092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61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62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parent-style-name="753" style:list-style-name="WWNum1" style:family="paragraph" style:name="P102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63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64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65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parent-style-name="753" style:list-style-name="WWNum1" style:family="paragraph" style:name="P103">
      <style:paragraph-properties fo:text-align="justify" fo:margin-left="1.27cm" fo:margin-right="0cm" fo:text-indent="-0.635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66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67">
      <style:text-properties fo:color="#376092" fo:font-family="Coolvetica Cond" style:font-family-asian="Coolvetica Cond" style:font-family-complex="Coolvetica Cond" fo:font-size="18pt" style:font-size-complex="18pt" fo:language="en" style:language-complex="hi" fo:country="IN" style:country-complex="IN"/>
    </style:style>
    <style:style style:family="text" style:name="T768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69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70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parent-style-name="753" style:list-style-name="WWNum1" style:family="paragraph" style:name="P104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71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72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/>
    </style:style>
    <style:style style:family="text" style:name="T773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74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75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parent-style-name="753" style:list-style-name="WWNum1" style:family="paragraph" style:name="P105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76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77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78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parent-style-name="753" style:list-style-name="WWNum1" style:family="paragraph" style:name="P106">
      <style:paragraph-properties fo:text-align="justify" fo:margin-left="1.27cm" fo:margin-right="0cm" fo:text-indent="-0.635cm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79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80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family="text" style:name="T781">
      <style:text-properties fo:color="#376092" fo:font-family="Coolvetica Cond" style:font-family-asian="Coolvetica Cond" style:font-family-complex="Coolvetica Cond" fo:font-size="18pt" style:font-size-complex="18pt" style:language-complex="hi" style:country-complex="IN"/>
    </style:style>
    <style:style style:parent-style-name="753" style:list-style-name="WWNum1" style:family="paragraph" style:name="P107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82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83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84">
      <style:text-properties fo:color="#7f7f7f" fo:font-family="DejaVu Serif Condensed" style:font-family-complex="DejaVu Serif Condensed" fo:font-size="11pt" style:font-size-complex="11pt" fo:font-style="italic"/>
    </style:style>
    <style:style style:parent-style-name="753" style:list-style-name="WWNum1" style:family="paragraph" style:name="P108">
      <style:paragraph-properties fo:text-align="justify" fo:margin-left="2.54cm" fo:margin-right="0cm" fo:text-indent="-0.635cm"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785">
      <style:text-properties fo:color="#7f7f7f" fo:font-family="DejaVu Serif Condensed" style:font-family-complex="DejaVu Serif Condensed" fo:font-size="11pt" style:font-size-complex="11pt" fo:language="en" fo:country="IN" fo:font-style="italic"/>
    </style:style>
    <style:style style:family="text" style:name="T786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family="text" style:name="T787">
      <style:text-properties fo:color="#7f7f7f" fo:font-family="DejaVu Serif Condensed" style:font-family-complex="DejaVu Serif Condensed" fo:font-size="11pt" style:font-size-complex="11pt" style:language-complex="hi" style:country-complex="IN" fo:font-style="italic"/>
    </style:style>
    <style:style style:parent-style-name="753" style:family="paragraph" style:name="P109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88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89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90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110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91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92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93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111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94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795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796">
      <style:text-properties fo:color="#7f7f7f" fo:font-family="Arial" style:font-family-complex="Arial" fo:font-size="11pt" style:font-size-complex="11pt" style:language-complex="hi" style:country-complex="IN"/>
    </style:style>
    <style:style style:parent-style-name="761" style:family="paragraph" style:name="P112">
      <style:paragraph-properties fo:text-align="justify"/>
      <style:text-properties fo:color="#000000" fo:font-family="Arial" style:font-family-complex="Arial" fo:font-size="16pt" style:font-size-complex="16pt" style:language-complex="hi" style:country-complex="IN" fo:font-weight="normal"/>
    </style:style>
    <style:style style:family="text" style:name="T797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 fo:font-weight="normal"/>
    </style:style>
    <style:style style:family="text" style:name="T798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 fo:font-weight="normal"/>
    </style:style>
    <style:style style:family="text" style:name="T799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 fo:font-weight="normal"/>
    </style:style>
    <style:style style:family="text" style:name="T800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 fo:font-weight="normal"/>
    </style:style>
    <style:style style:family="text" style:name="T801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 fo:font-weight="normal"/>
    </style:style>
    <style:style style:parent-style-name="753" style:family="paragraph" style:name="P113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0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803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804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114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05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806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807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115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 fo:font-style="italic" fo:font-weight="normal"/>
    </style:style>
    <style:style style:family="text" style:name="T808">
      <style:text-properties fo:color="#000000" fo:font-family="DejaVu Serif Condensed" style:font-family-complex="DejaVu Serif Condensed" fo:font-size="14pt" style:font-size-complex="14pt" style:language-complex="hi" style:country-complex="IN" fo:font-style="italic" fo:font-weight="normal"/>
    </style:style>
    <style:style style:family="text" style:name="T809">
      <style:text-properties fo:color="#000000" fo:font-family="Arial" style:font-family-complex="Arial" fo:font-size="14pt" style:font-size-complex="14pt" style:language-complex="hi" style:country-complex="IN" fo:font-style="italic" fo:font-weight="normal"/>
    </style:style>
    <style:style style:family="text" style:name="T810">
      <style:text-properties fo:color="#000000" fo:font-family="Arial" style:font-family-complex="Arial" fo:font-size="14pt" style:font-size-complex="14pt" style:language-complex="hi" style:country-complex="IN" fo:font-style="italic" fo:font-weight="normal"/>
    </style:style>
    <style:style style:parent-style-name="761" style:list-style-name="WWNum2" style:family="paragraph" style:name="P116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11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family="text" style:name="T812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13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family="text" style:name="T814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parent-style-name="761" style:list-style-name="WWNum2" style:family="paragraph" style:name="P117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15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16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17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18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parent-style-name="761" style:list-style-name="WWNum2" style:family="paragraph" style:name="P118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19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0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1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2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parent-style-name="761" style:list-style-name="WWNum2" style:family="paragraph" style:name="P119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23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4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5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6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7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parent-style-name="753" style:family="paragraph" style:name="P120">
      <style:paragraph-properties fo:text-align="justify"/>
      <style:text-properties fo:color="#000000" fo:font-family="Arial" style:font-family-complex="Arial" fo:font-size="11pt" style:font-size-complex="11pt" style:language-complex="hi" style:country-complex="IN" fo:font-style="normal" fo:font-weight="normal"/>
    </style:style>
    <style:style style:family="text" style:name="T828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29">
      <style:text-properties fo:color="#7f7f7f" fo:font-family="Arial" style:font-family-complex="Arial" fo:font-size="11pt" style:font-size-complex="11pt" style:language-complex="hi" style:country-complex="IN" fo:font-style="normal" fo:font-weight="normal"/>
    </style:style>
    <style:style style:family="text" style:name="T830">
      <style:text-properties fo:color="#7f7f7f" fo:font-family="Arial" style:font-family-complex="Arial" fo:font-size="11pt" style:font-size-complex="11pt" style:language-complex="hi" style:country-complex="IN" fo:font-style="normal" fo:font-weight="normal"/>
    </style:style>
    <style:style style:parent-style-name="753" style:family="paragraph" style:name="P121">
      <style:paragraph-properties fo:text-align="justify" fo:margin-left="1.27cm" fo:margin-right="0cm" fo:text-indent="0cm"/>
      <style:text-properties fo:color="#000000" fo:font-family="Arial" style:font-family-complex="Arial" fo:font-size="11pt" style:font-size-complex="11pt" style:language-complex="hi" style:country-complex="IN" fo:font-style="italic" fo:font-weight="normal"/>
    </style:style>
    <style:style style:family="text" style:name="T831">
      <style:text-properties fo:color="#000000" fo:font-family="DejaVu Serif Condensed" style:font-family-complex="DejaVu Serif Condensed" fo:font-size="14pt" style:font-size-complex="14pt" style:language-complex="hi" style:country-complex="IN" fo:font-style="italic" fo:font-weight="normal"/>
    </style:style>
    <style:style style:family="text" style:name="T832">
      <style:text-properties fo:color="#000000" fo:font-family="Arial" style:font-family-complex="Arial" fo:font-size="14pt" style:font-size-complex="14pt" style:language-complex="hi" style:country-complex="IN" fo:font-style="italic" fo:font-weight="normal"/>
    </style:style>
    <style:style style:family="text" style:name="T833">
      <style:text-properties fo:color="#000000" fo:font-family="Arial" style:font-family-complex="Arial" fo:font-size="14pt" style:font-size-complex="14pt" style:language-complex="hi" style:country-complex="IN" fo:font-style="italic" fo:font-weight="normal"/>
    </style:style>
    <style:style style:parent-style-name="761" style:list-style-name="WWNum2" style:family="paragraph" style:name="P122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34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family="text" style:name="T835">
      <style:text-properties fo:color="#376092" fo:font-family="Coolvetica Cond" style:font-family-asian="Coolvetica Cond" style:font-family-complex="Coolvetica Cond" fo:font-size="18pt" style:font-size-complex="18pt" style:language-complex="hi" style:country-complex="IN" fo:font-style="normal" fo:font-weight="normal"/>
    </style:style>
    <style:style style:family="text" style:name="T836">
      <style:text-properties fo:color="#376092" fo:font-family="Coolvetica Cond" style:font-family-asian="Coolvetica Cond" style:font-family-complex="Coolvetica Cond" fo:font-size="18pt" style:font-size-complex="18pt" fo:language="en" fo:country="IN" fo:font-style="normal" fo:font-weight="normal"/>
    </style:style>
    <style:style style:family="text" style:name="T837">
      <style:text-properties fo:color="#376092" fo:font-family="Coolvetica Cond" style:font-family-asian="Coolvetica Cond" style:font-family-complex="Coolvetica Cond" fo:font-size="18pt" style:font-size-complex="18pt" style:language-complex="hi" style:country-complex="IN" fo:font-style="normal" fo:font-weight="normal"/>
    </style:style>
    <style:style style:family="text" style:name="T838">
      <style:text-properties fo:color="#376092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39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40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family="text" style:name="T841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parent-style-name="761" style:list-style-name="WWNum2" style:family="paragraph" style:name="P123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42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43">
      <style:text-properties fo:color="#376092" fo:font-family="Coolvetica Cond" style:font-family-asian="Coolvetica Cond" style:font-family-complex="Coolvetica Cond" fo:font-size="18pt" style:font-size-complex="18pt" style:language-complex="hi" style:country-complex="IN" fo:font-style="normal" fo:font-weight="normal"/>
    </style:style>
    <style:style style:family="text" style:name="T844">
      <style:text-properties fo:color="#376092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family="text" style:name="T845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bold"/>
    </style:style>
    <style:style style:family="text" style:name="T846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47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family="text" style:name="T848">
      <style:text-properties fo:color="#7f7f7f" fo:font-family="DejaVu Serif Condensed" style:font-family-complex="DejaVu Serif Condensed" fo:font-size="11pt" style:font-size-complex="11pt" style:language-complex="hi" style:country-complex="IN" fo:font-style="normal" fo:font-weight="normal"/>
    </style:style>
    <style:style style:parent-style-name="761" style:list-style-name="WWNum2" style:family="paragraph" style:name="P124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49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50">
      <style:text-properties fo:color="#376092" fo:font-family="Coolvetica Cond" style:font-family-asian="Coolvetica Cond" style:font-family-complex="Coolvetica Cond" fo:font-size="18pt" style:font-size-complex="18pt" fo:language="en" style:language-complex="hi" fo:country="IN" style:country-complex="IN" fo:font-style="normal" fo:font-weight="normal"/>
    </style:style>
    <style:style style:family="text" style:name="T851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52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53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normal"/>
    </style:style>
    <style:style style:family="text" style:name="T854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normal"/>
    </style:style>
    <style:style style:family="text" style:name="T855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56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italic" fo:font-weight="normal"/>
    </style:style>
    <style:style style:family="text" style:name="T857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58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59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parent-style-name="761" style:list-style-name="WWNum2" style:family="paragraph" style:name="P125">
      <style:paragraph-properties/>
      <style:text-properties fo:color="#000000" fo:font-family="Arial" style:font-family-complex="Arial" fo:font-size="16pt" style:font-size-complex="16pt" style:language-complex="hi" style:country-complex="IN" fo:font-style="normal" fo:font-weight="normal"/>
    </style:style>
    <style:style style:family="text" style:name="T860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61">
      <style:text-properties fo:color="#376092" fo:font-family="Coolvetica Cond" style:font-family-asian="Coolvetica Cond" style:font-family-complex="Coolvetica Cond" fo:font-size="18pt" style:font-size-complex="18pt" fo:language="en" style:language-complex="hi" fo:country="IN" style:country-complex="IN" fo:font-style="normal" fo:font-weight="normal"/>
    </style:style>
    <style:style style:family="text" style:name="T862">
      <style:text-properties fo:color="#376092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63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64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family="text" style:name="T865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 fo:font-style="normal" fo:font-weight="normal"/>
    </style:style>
    <style:style style:parent-style-name="753" style:family="paragraph" style:name="P126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66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867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868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127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69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870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871">
      <style:text-properties fo:color="#7f7f7f" fo:font-family="Arial" style:font-family-complex="Arial" fo:font-size="11pt" style:font-size-complex="11pt" style:language-complex="hi" style:country-complex="IN"/>
    </style:style>
    <style:style style:parent-style-name="753" style:family="paragraph" style:name="P128">
      <style:paragraph-properties fo:text-align="justify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72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873">
      <style:text-properties fo:color="#7f7f7f" fo:font-family="Arial" style:font-family-complex="Arial" fo:font-size="11pt" style:font-size-complex="11pt" style:language-complex="hi" style:country-complex="IN"/>
    </style:style>
    <style:style style:family="text" style:name="T874">
      <style:text-properties fo:color="#7f7f7f" fo:font-family="Arial" style:font-family-complex="Arial" fo:font-size="11pt" style:font-size-complex="11pt" style:language-complex="hi" style:country-complex="IN"/>
    </style:style>
    <style:style style:parent-style-name="754" style:family="paragraph" style:name="P129">
      <style:paragraph-properties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875">
      <style:text-properties fo:color="#7f7f7f" fo:font-family="DejaVu Serif Condensed" style:font-family-complex="DejaVu Serif Condensed" fo:font-size="16pt" style:font-size-complex="16pt" fo:language="en" style:language-complex="hi" fo:country="IN" style:country-complex="IN"/>
    </style:style>
    <style:style style:family="text" style:name="T876">
      <style:text-properties fo:color="#7f7f7f" fo:font-family="DejaVu Serif Condensed" style:font-family-complex="DejaVu Serif Condensed" fo:font-size="16pt" style:font-size-complex="16pt" fo:language="en" style:language-complex="hi" fo:country="IN" style:country-complex="IN"/>
    </style:style>
    <style:style style:family="text" style:name="T877">
      <style:text-properties fo:color="#7f7f7f" fo:font-family="Liberation Sans" style:font-family-complex="Liberation Sans" fo:font-size="14pt" style:font-size-complex="14pt" fo:language="en" style:language-complex="hi" fo:country="IN" style:country-complex="IN"/>
    </style:style>
    <style:style style:parent-style-name="754" style:family="paragraph" style:name="P130">
      <style:paragraph-properties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878">
      <style:text-properties fo:color="#7f7f7f" fo:font-family="DejaVu Serif Condensed" style:font-family-complex="DejaVu Serif Condensed" fo:font-size="16pt" style:font-size-complex="16pt" fo:language="en" style:language-complex="hi" fo:country="IN" style:country-complex="IN"/>
    </style:style>
    <style:style style:family="text" style:name="T879">
      <style:text-properties fo:color="#7f7f7f" fo:font-family="DejaVu Serif Condensed" style:font-family-complex="DejaVu Serif Condensed" fo:font-size="16pt" style:font-size-complex="16pt" fo:language="en" style:language-complex="hi" fo:country="IN" style:country-complex="IN"/>
    </style:style>
    <style:style style:family="text" style:name="T880">
      <style:text-properties fo:color="#7f7f7f" fo:font-family="Liberation Sans" style:font-family-complex="Liberation Sans" fo:font-size="14pt" style:font-size-complex="14pt" fo:language="en" style:language-complex="hi" fo:country="IN" style:country-complex="IN"/>
    </style:style>
    <style:style style:parent-style-name="754" style:family="paragraph" style:name="P131">
      <style:paragraph-properties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881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/>
    </style:style>
    <style:style style:family="text" style:name="T882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/>
    </style:style>
    <style:style style:family="text" style:name="T883">
      <style:text-properties fo:color="#000000" fo:font-family="DejaVu Serif Condensed" style:font-family-complex="DejaVu Serif Condensed" fo:font-size="16pt" style:font-size-complex="16pt" fo:language="en" style:language-complex="hi" fo:country="IN" style:country-complex="IN"/>
    </style:style>
    <style:style style:family="text" style:name="T884">
      <style:text-properties fo:color="#000000" fo:font-family="Liberation Sans" style:font-family-complex="Liberation Sans" fo:font-size="14pt" style:font-size-complex="14pt" fo:language="en" style:language-complex="hi" fo:country="IN" style:country-complex="IN"/>
    </style:style>
    <style:style style:parent-style-name="755" style:family="paragraph" style:name="P132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85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886">
      <style:text-properties fo:color="#7f7f7f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87">
      <style:text-properties fo:color="#7f7f7f" fo:font-family="DejaVu Serif Condensed" style:font-family-complex="DejaVu Serif Condensed" fo:font-size="11pt" style:font-size-complex="11pt" style:language-complex="hi" style:country-complex="IN"/>
    </style:style>
    <style:style style:family="text" style:name="T888">
      <style:text-properties fo:color="#7f7f7f" fo:font-family="Arial" style:font-family-complex="Arial" fo:font-size="11pt" style:font-size-complex="11pt" style:language-complex="hi" style:country-complex="IN"/>
    </style:style>
    <style:style style:parent-style-name="757" style:family="paragraph" style:name="P133">
      <style:paragraph-properties/>
      <style:text-properties fo:color="#000000" fo:font-family="Arial" style:font-family-complex="Arial" fo:font-size="12pt" style:font-size-complex="12pt" style:language-complex="hi" style:country-complex="IN" fo:font-style="italic"/>
    </style:style>
    <style:style style:family="text" style:name="T889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890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891">
      <style:text-properties fo:color="#7f7f7f"/>
    </style:style>
    <style:style style:family="text" style:name="T892">
      <style:text-properties fo:color="#7f7f7f" fo:font-family="Adwaita Mono" style:font-family-asian="Adwaita Mono" style:font-family-complex="Adwaita Mono" fo:font-size="8pt" style:font-size-complex="8pt" style:language-complex="hi" style:country-complex="IN" fo:font-style="italic"/>
    </style:style>
    <style:style style:family="text" style:name="T893">
      <style:text-properties fo:color="#7f7f7f" fo:font-family="Adwaita Mono" style:font-family-asian="Adwaita Mono" style:font-family-complex="Adwaita Mono" fo:font-size="8pt" style:font-size-complex="8pt"/>
    </style:style>
    <style:style style:family="text" style:name="T894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895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896">
      <style:text-properties fo:color="#7f7f7f" fo:font-family="Arial" style:font-family-complex="Arial" fo:font-size="12pt" style:font-size-complex="12pt" style:language-complex="hi" style:country-complex="IN" fo:font-style="italic"/>
    </style:style>
    <style:style style:parent-style-name="755" style:family="paragraph" style:name="P134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97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898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899">
      <style:text-properties fo:color="#7f7f7f" fo:font-family="Arial" style:font-family-complex="Arial" fo:font-size="11pt" style:font-size-complex="11pt" fo:language="en" style:language-complex="hi" fo:country="IN" style:country-complex="IN"/>
    </style:style>
    <style:style style:parent-style-name="755" style:family="paragraph" style:name="P135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00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901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902">
      <style:text-properties fo:color="#7f7f7f" fo:font-family="Arial" style:font-family-complex="Arial" fo:font-size="11pt" style:font-size-complex="11pt" fo:language="en" style:language-complex="hi" fo:country="IN" style:country-complex="IN"/>
    </style:style>
    <style:style style:parent-style-name="755" style:family="paragraph" style:name="P136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03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904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905">
      <style:text-properties fo:color="#7f7f7f" fo:font-family="Arial" style:font-family-complex="Arial" fo:font-size="11pt" style:font-size-complex="11pt" fo:language="en" style:language-complex="hi" fo:country="IN" style:country-complex="IN"/>
    </style:style>
    <style:style style:parent-style-name="755" style:family="paragraph" style:name="P137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06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907">
      <style:text-properties fo:color="#7f7f7f" fo:font-family="DejaVu Serif Condensed" style:font-family-complex="DejaVu Serif Condensed" fo:font-size="11pt" style:font-size-complex="11pt" fo:language="en" style:language-complex="hi" fo:country="IN" style:country-complex="IN"/>
    </style:style>
    <style:style style:family="text" style:name="T908">
      <style:text-properties fo:color="#7f7f7f" fo:font-family="Arial" style:font-family-complex="Arial" fo:font-size="11pt" style:font-size-complex="11pt" fo:language="en" style:language-complex="hi" fo:country="IN" style:country-complex="IN"/>
    </style:style>
    <style:style style:parent-style-name="755" style:list-style-name="WWNum14" style:family="paragraph" style:name="P138">
      <style:paragraph-properties/>
      <style:text-properties fo:color="#000000" fo:font-family="Arial" style:font-family-complex="Arial" fo:font-size="11pt" style:font-size-complex="11pt" style:language-complex="hi" style:country-complex="IN" fo:font-weight="normal"/>
    </style:style>
    <style:style style:family="text" style:name="T909">
      <style:text-properties fo:color="#376092" fo:font-family="Coolvetica Cond" style:font-family-asian="Coolvetica Cond" style:font-family-complex="Coolvetica Cond" fo:font-size="18pt" style:font-size-complex="18pt" fo:language="en" style:language-complex="en" fo:country="IN" style:country-complex="IN" fo:font-weight="normal"/>
    </style:style>
    <style:style style:family="text" style:name="T910">
      <style:text-properties fo:color="#376092" fo:font-family="Coolvetica Cond" style:font-family-asian="Coolvetica Cond" style:font-family-complex="Coolvetica Cond" fo:font-size="18pt" style:font-size-complex="18pt" fo:language="en" style:language-complex="en" fo:country="IN" style:country-complex="IN" fo:font-weight="normal"/>
    </style:style>
    <style:style style:family="text" style:name="T911">
      <style:text-properties fo:color="#376092" fo:font-family="Coolvetica Cond" style:font-family-asian="Coolvetica Cond" style:font-family-complex="Coolvetica Cond" fo:font-size="18pt" style:font-size-complex="18pt" fo:language="en" style:language-complex="en" fo:country="IN" style:country-complex="IN" fo:font-weight="normal"/>
    </style:style>
    <style:style style:family="text" style:name="T912">
      <style:text-properties fo:color="#376092" fo:font-family="Coolvetica Cond" style:font-family-asian="Coolvetica Cond" style:font-family-complex="Coolvetica Cond" fo:font-size="18pt" style:font-size-complex="18pt" fo:language="en" style:language-complex="en" fo:country="IN" style:country-complex="IN" fo:font-weight="normal"/>
    </style:style>
    <style:style style:parent-style-name="755" style:list-style-name="WWNum14" style:family="paragraph" style:name="P139">
      <style:paragraph-properties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913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style="italic"/>
    </style:style>
    <style:style style:family="text" style:name="T914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style="italic"/>
    </style:style>
    <style:style style:family="text" style:name="T915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style="italic"/>
    </style:style>
    <style:style style:parent-style-name="755" style:list-style-name="WWNum14" style:family="paragraph" style:name="P140">
      <style:paragraph-properties/>
      <style:text-properties fo:color="#000000" fo:font-family="Arial" style:font-family-complex="Arial" fo:font-size="11pt" style:font-size-complex="11pt" style:language-complex="hi" style:country-complex="IN" fo:font-weight="bold"/>
    </style:style>
    <style:style style:family="text" style:name="T916">
      <style:text-properties fo:color="#376092" fo:font-family="Coolvetica Cond" style:font-family-asian="Coolvetica Cond" style:font-family-complex="Coolvetica Cond" fo:font-size="16pt" style:font-size-complex="16pt" fo:language="en" style:language-complex="en" fo:country="IN" style:country-complex="IN" fo:font-weight="normal"/>
    </style:style>
    <style:style style:family="text" style:name="T917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family="text" style:name="T918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family="text" style:name="T919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parent-style-name="755" style:list-style-name="WWNum14" style:family="paragraph" style:name="P141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20">
      <style:text-properties fo:color="#7f7f7f" fo:font-family="Arial" style:font-family-complex="Arial" fo:font-size="11pt" style:font-size-complex="11pt" fo:language="en" style:language-complex="hi" fo:country="IN" style:country-complex="IN"/>
    </style:style>
    <style:style style:family="text" style:name="T921">
      <style:text-properties fo:color="#376092" fo:font-family="Coolvetica Cond" style:font-family-asian="Coolvetica Cond" style:font-family-complex="Coolvetica Cond" fo:font-size="16pt" style:font-size-complex="16pt" fo:language="en" style:language-complex="en" fo:country="IN" style:country-complex="IN" fo:font-weight="normal"/>
    </style:style>
    <style:style style:family="text" style:name="T922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23">
      <style:text-properties fo:color="#7f7f7f" fo:font-family="Arial" style:font-family-complex="Arial" fo:font-size="11pt" style:font-size-complex="11pt" fo:language="en" style:language-complex="hi" fo:country="IN" style:country-complex="IN"/>
    </style:style>
    <style:style style:family="text" style:name="T924">
      <style:text-properties fo:color="#7f7f7f" fo:font-family="Arial" style:font-family-complex="Arial" fo:font-size="11pt" style:font-size-complex="11pt" fo:language="en" style:language-complex="hi" fo:country="IN" style:country-complex="IN"/>
    </style:style>
    <style:style style:parent-style-name="755" style:list-style-name="WWNum14" style:family="paragraph" style:name="P142">
      <style:paragraph-properties/>
      <style:text-properties fo:color="#000000" fo:font-family="Arial" style:font-family-complex="Arial" fo:font-size="11pt" style:font-size-complex="11pt" style:language-complex="hi" style:country-complex="IN" fo:font-weight="bold"/>
    </style:style>
    <style:style style:family="text" style:name="T925">
      <style:text-properties fo:color="#376092" fo:font-family="Coolvetica Cond" style:font-family-asian="Coolvetica Cond" style:font-family-complex="Coolvetica Cond" fo:font-size="16pt" style:font-size-complex="16pt" fo:language="en" style:language-complex="en" fo:country="IN" style:country-complex="IN" fo:font-weight="normal"/>
    </style:style>
    <style:style style:family="text" style:name="T926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family="text" style:name="T927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family="text" style:name="T928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parent-style-name="755" style:list-style-name="WWNum14" style:family="paragraph" style:name="P143">
      <style:paragraph-properties/>
      <style:text-properties fo:color="#000000" fo:font-family="Arial" style:font-family-complex="Arial" fo:font-size="11pt" style:font-size-complex="11pt" style:language-complex="hi" style:country-complex="IN" fo:font-weight="bold"/>
    </style:style>
    <style:style style:family="text" style:name="T929">
      <style:text-properties fo:color="#376092" fo:font-family="Coolvetica Cond" style:font-family-asian="Coolvetica Cond" style:font-family-complex="Coolvetica Cond" fo:font-size="16pt" style:font-size-complex="16pt" fo:language="en" style:language-complex="en" fo:country="IN" style:country-complex="IN" fo:font-weight="normal"/>
    </style:style>
    <style:style style:family="text" style:name="T930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family="text" style:name="T931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family="text" style:name="T932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parent-style-name="755" style:list-style-name="WWNum14" style:family="paragraph" style:name="P144">
      <style:paragraph-properties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933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style="italic"/>
    </style:style>
    <style:style style:family="text" style:name="T934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style="italic"/>
    </style:style>
    <style:style style:family="text" style:name="T935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style="italic"/>
    </style:style>
    <style:style style:parent-style-name="755" style:list-style-name="WWNum14" style:family="paragraph" style:name="P145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36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37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38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39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parent-style-name="755" style:list-style-name="WWNum14" style:family="paragraph" style:name="P146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40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41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42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parent-style-name="755" style:list-style-name="WWNum14" style:family="paragraph" style:name="P147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43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44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45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family="text" style:name="T946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/>
    </style:style>
    <style:style style:parent-style-name="755" style:list-style-name="WWNum14" style:family="paragraph" style:name="P148">
      <style:paragraph-properties/>
      <style:text-properties fo:color="#000000" fo:font-family="Arial" style:font-family-complex="Arial" fo:font-size="11pt" style:font-size-complex="11pt" style:language-complex="hi" style:country-complex="IN" fo:font-weight="normal"/>
    </style:style>
    <style:style style:family="text" style:name="T947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family="text" style:name="T948">
      <style:text-properties fo:color="#376092" fo:font-family="Coolvetica Cond" style:font-family-asian="Coolvetica Cond" style:font-family-complex="Coolvetica Cond" fo:font-size="18pt" style:font-size-complex="18pt" fo:language="en" style:language-complex="en" fo:country="IN" style:country-complex="IN" fo:font-weight="normal"/>
    </style:style>
    <style:style style:family="text" style:name="T949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family="text" style:name="T950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family="text" style:name="T951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parent-style-name="755" style:list-style-name="WWNum14" style:family="paragraph" style:name="P149">
      <style:paragraph-properties/>
      <style:text-properties fo:color="#000000" fo:font-family="Arial" style:font-family-complex="Arial" fo:font-size="11pt" style:font-size-complex="11pt" style:language-complex="hi" style:country-complex="IN" fo:font-weight="normal"/>
    </style:style>
    <style:style style:family="text" style:name="T952">
      <style:text-properties fo:color="#376092" fo:font-family="Coolvetica Cond" style:font-family-asian="Coolvetica Cond" style:font-family-complex="Coolvetica Cond" fo:font-size="18pt" style:font-size-complex="18pt" fo:language="en" style:language-complex="en" fo:country="IN" style:country-complex="IN" fo:font-weight="normal"/>
    </style:style>
    <style:style style:family="text" style:name="T953">
      <style:text-properties fo:color="#376092" fo:font-family="Coolvetica Cond" style:font-family-asian="Coolvetica Cond" style:font-family-complex="Coolvetica Cond" fo:font-size="18pt" style:font-size-complex="18pt" fo:language="en" style:language-complex="en" fo:country="IN" style:country-complex="IN" fo:font-weight="normal"/>
    </style:style>
    <style:style style:family="text" style:name="T954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bold"/>
    </style:style>
    <style:style style:family="text" style:name="T955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family="text" style:name="T956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family="text" style:name="T957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family="text" style:name="T958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family="text" style:name="T959">
      <style:text-properties fo:color="#7f7f7f" fo:font-family="DejaVu Serif Condensed" style:font-family-complex="DejaVu Serif Condensed" fo:font-size="11pt" style:font-size-complex="11pt" fo:language="en" style:language-complex="en" fo:country="IN" style:country-complex="IN" fo:font-weight="normal"/>
    </style:style>
    <style:style style:parent-style-name="754" style:family="paragraph" style:name="P150">
      <style:paragraph-properties fo:border="0.01764cm solid #000000"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960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61">
      <style:text-properties fo:color="#7f7f7f"/>
    </style:style>
    <style:style style:family="text" style:name="T962">
      <style:text-properties fo:color="#7f7f7f"/>
    </style:style>
    <style:style style:parent-style-name="Graphics" style:family="graphic" style:name="gr4">
      <style:graphic-properties style:repeat="stretch" fo:clip="rect(0cm, 0.570709cm, 0cm, 0cm)" style:wrap="run-through" fo:margin-left="0cm" fo:margin-right="0cm" fo:margin-top="0cm" fo:margin-bottom="0cm" style:vertical-pos="middle" style:vertical-rel="baseline" fo:background-color="transparent"/>
    </style:style>
    <style:style style:family="text" style:name="T963">
      <style:text-properties fo:color="#7f7f7f"/>
    </style:style>
    <style:style style:family="text" style:name="T964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65">
      <style:text-properties fo:color="#7f7f7f" fo:font-family="Liberation Sans" style:font-family-complex="Liberation Sans" fo:font-size="14pt" style:font-size-complex="14pt" style:language-complex="hi" style:country-complex="IN"/>
    </style:style>
    <style:style style:parent-style-name="757" style:family="paragraph" style:name="P151">
      <style:paragraph-properties fo:border="0.01764cm solid #000000"/>
      <style:text-properties fo:color="#000000" fo:font-family="Arial" style:font-family-complex="Arial" fo:font-size="12pt" style:font-size-complex="12pt" style:language-complex="hi" style:country-complex="IN" fo:font-style="italic"/>
    </style:style>
    <style:style style:family="text" style:name="T966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967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968">
      <style:text-properties fo:color="#7f7f7f"/>
    </style:style>
    <style:style style:family="text" style:name="T969">
      <style:text-properties fo:color="#7f7f7f" fo:font-family="Adwaita Mono" style:font-family-asian="Adwaita Mono" style:font-family-complex="Adwaita Mono" fo:font-size="8pt" style:font-size-complex="8pt" style:language-complex="hi" style:country-complex="IN" fo:font-style="italic"/>
    </style:style>
    <style:style style:family="text" style:name="T970">
      <style:text-properties fo:color="#7f7f7f" fo:font-family="Adwaita Mono" style:font-family-asian="Adwaita Mono" style:font-family-complex="Adwaita Mono" fo:font-size="8pt" style:font-size-complex="8pt"/>
    </style:style>
    <style:style style:family="text" style:name="T971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972">
      <style:text-properties fo:color="#7f7f7f" fo:font-family="Adwaita Mono" style:font-family-complex="Adwaita Mono" fo:font-size="5pt" style:font-size-complex="5pt" style:language-complex="hi" style:country-complex="IN" fo:font-style="normal"/>
    </style:style>
    <style:style style:family="text" style:name="T973">
      <style:text-properties fo:color="#7f7f7f" fo:font-family="Arial" style:font-family-complex="Arial" fo:font-size="12pt" style:font-size-complex="12pt" style:language-complex="hi" style:country-complex="IN" fo:font-style="italic"/>
    </style:style>
    <style:style style:parent-style-name="754" style:family="paragraph" style:name="P152">
      <style:paragraph-properties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974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75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76">
      <style:text-properties fo:color="#7f7f7f" fo:font-family="Liberation Sans" style:font-family-complex="Liberation Sans" fo:font-size="14pt" style:font-size-complex="14pt" style:language-complex="hi" style:country-complex="IN"/>
    </style:style>
    <style:style style:parent-style-name="754" style:family="paragraph" style:name="P153">
      <style:paragraph-properties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977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78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79">
      <style:text-properties fo:color="#7f7f7f" fo:font-family="Liberation Sans" style:font-family-complex="Liberation Sans" fo:font-size="14pt" style:font-size-complex="14pt" style:language-complex="hi" style:country-complex="IN"/>
    </style:style>
    <style:style style:parent-style-name="754" style:family="paragraph" style:name="P154">
      <style:paragraph-properties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980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81">
      <style:text-properties fo:color="#7f7f7f" fo:font-family="DejaVu Serif Condensed" style:font-family-complex="DejaVu Serif Condensed" fo:font-size="16pt" style:font-size-complex="16pt" style:language-complex="hi" style:country-complex="IN"/>
    </style:style>
    <style:style style:family="text" style:name="T982">
      <style:text-properties fo:color="#7f7f7f" fo:font-family="Liberation Sans" style:font-family-complex="Liberation Sans" fo:font-size="14pt" style:font-size-complex="14pt" style:language-complex="hi" style:country-complex="IN"/>
    </style:style>
    <style:style style:parent-style-name="754" style:family="paragraph" style:name="P155">
      <style:paragraph-properties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983">
      <style:text-properties fo:color="#7f7f7f" fo:font-family="Arial" style:font-family-complex="Arial" fo:font-size="16pt" style:font-size-complex="16pt" style:language-complex="hi" style:country-complex="IN"/>
    </style:style>
    <style:style style:family="text" style:name="T984">
      <style:text-properties fo:color="#7f7f7f" fo:font-family="Arial" style:font-family-complex="Arial" fo:font-size="16pt" style:font-size-complex="16pt" style:language-complex="hi" style:country-complex="IN"/>
    </style:style>
    <style:style style:family="text" style:name="T985">
      <style:text-properties fo:color="#7f7f7f" fo:font-family="Liberation Sans" style:font-family-complex="Liberation Sans" fo:font-size="14pt" style:font-size-complex="14pt" style:language-complex="hi" style:country-complex="IN"/>
    </style:style>
    <style:style style:parent-style-name="754" style:family="paragraph" style:name="P156">
      <style:paragraph-properties fo:text-align="center"/>
      <style:text-properties fo:color="#000000" fo:font-family="Liberation Sans" style:font-family-complex="Liberation Sans" fo:font-size="14pt" style:font-size-complex="14pt" style:language-complex="hi" style:country-complex="IN"/>
    </style:style>
    <style:style style:family="text" style:name="T986">
      <style:text-properties fo:color="#7f7f7f" fo:font-family="Adwaita Mono" style:font-family-complex="Adwaita Mono" fo:font-size="11pt" style:font-size-complex="11pt" fo:language="en" style:language-complex="hi" fo:country="IN" style:country-complex="IN"/>
    </style:style>
    <style:style style:family="text" style:name="T987">
      <style:text-properties fo:color="#7f7f7f" fo:font-family="Adwaita Mono" style:font-family-complex="Adwaita Mono" fo:font-size="11pt" style:font-size-complex="11pt" fo:language="en" style:language-complex="hi" fo:country="IN" style:country-complex="IN"/>
    </style:style>
    <style:style style:family="text" style:name="T988">
      <style:text-properties fo:color="#7f7f7f" fo:font-family="Adwaita Mono" style:font-family-complex="Adwaita Mono" fo:font-size="11pt" style:font-size-complex="11pt" fo:language="en" style:language-complex="hi" fo:country="IN" style:country-complex="IN"/>
    </style:style>
    <style:style style:family="text" style:name="T989">
      <style:text-properties fo:color="#7f7f7f" fo:font-family="Liberation Sans" style:font-family-complex="Liberation Sans" fo:font-size="14pt" style:font-size-complex="14pt" style:language-complex="hi" style:country-complex="IN"/>
    </style:style>
  </office:automatic-styles>
  <office:body>
    <office:text text:use-soft-page-breaks="true">
      <text:p text:style-name="P42"><text:span text:style-name="T506"/><text:span text:style-name="T507"/><text:span text:style-name="T508"/></text:p>
      <text:p text:style-name="P43"><text:span text:style-name="T509"/><text:bookmark-start text:name="_h1uklb75fvoo"/><text:span text:style-name="T510"/><text:bookmark-end text:name="_h1uklb75fvoo"/><text:span text:style-name="T511">Software</text:span><text:span text:style-name="T512"/><text:span text:style-name="T513"/></text:p>
      <text:p text:style-name="P44"><text:span text:style-name="T514">Engineering</text:span><text:span text:style-name="T515"/><text:span text:style-name="T516"/></text:p>
      <text:p text:style-name="P45"><text:span text:style-name="T517"/><text:span text:style-name="T518"/><text:span text:style-name="T519">Software Requirement Specifications, </text:span><text:span text:style-name="T520">Project </text:span><text:span text:style-name="T521">Plan</text:span><text:span text:style-name="T522">, </text:span><text:span text:style-name="T523">Draft Architecture and Design</text:span><text:span text:style-name="T524"/><text:span text:style-name="T525"/></text:p>
      <text:p text:style-name="P46"><text:span text:style-name="T526"/><text:span text:style-name="T527"/><text:span text:style-name="T528"/></text:p>
      <text:p text:style-name="P47"><text:span text:style-name="T529">E-commerce Website</text:span><text:span text:style-name="T530">:</text:span><text:span text:style-name="T531"><text:s/></text:span><text:span text:style-name="T532">Aesthetic Front</text:span><text:span text:style-name="T533">-</text:span><text:span text:style-name="T534">End and Functional Back</text:span><text:span text:style-name="T535">-</text:span><text:span text:style-name="T536">end</text:span><text:span text:style-name="T537"/><text:span text:style-name="T538"/></text:p>
      <text:p text:style-name="P48"><text:span text:style-name="T539"/><text:span text:style-name="T540"/><text:span text:style-name="T541"/></text:p>
      <text:p text:style-name="P49"><text:span text:style-name="T542"/><text:span text:style-name="T543"/><text:span text:style-name="T544"/></text:p>
      <text:list>
        <text:list-item>
          <text:p text:style-name="P50"><text:span text:style-name="T545"/><text:bookmark-start text:name="_p7x5y1m4gyv2"/><text:span text:style-name="T546"/><text:bookmark-end text:name="_p7x5y1m4gyv2"/><text:span text:style-name="T547"/><text:span text:style-name="T548"/></text:p>
        </text:list-item>
      </text:list>
      <text:p text:style-name="P51"><text:span text:style-name="T549"/><text:span text:style-name="T550"/><text:span text:style-name="T551"/></text:p>
      <text:p text:style-name="P52"><text:span text:style-name="T552"/><text:span text:style-name="T553"/><text:span text:style-name="T554"/></text:p>
      <text:list>
        <text:list-item>
          <text:p text:style-name="P53"><text:span text:style-name="T555"/><text:span text:style-name="T556"/><text:span text:style-name="T557"/></text:p>
        </text:list-item>
        <text:list-item>
          <text:p text:style-name="P54"><text:span text:style-name="T558"/><text:span text:style-name="T559"/><text:span text:style-name="T560"/></text:p>
        </text:list-item>
      </text:list>
      <text:p text:style-name="P55"><text:span text:style-name="T561"/><text:span text:style-name="T562"/><text:span text:style-name="T563"/></text:p>
      <text:p text:style-name="P56"><text:span text:style-name="T564"/><text:span text:style-name="T565"/><text:span text:style-name="T566"/></text:p>
      <text:p text:style-name="P57"><text:span text:style-name="T567"/><text:span text:style-name="T568"/><text:span text:style-name="T569"/></text:p>
      <text:p text:style-name="P58"><text:span text:style-name="T570"/><text:span text:style-name="T571"/><text:span text:style-name="T572"/></text:p>
      <text:p text:style-name="P59"><text:span text:style-name="T573"/><text:span text:style-name="T574"/><text:span text:style-name="T575"/></text:p>
      <text:p text:style-name="P60"><text:span text:style-name="T576"/><text:span text:style-name="T577"/><text:span text:style-name="T578"/></text:p>
      <text:p text:style-name="P61"><text:span text:style-name="T579"/><text:span text:style-name="T580"/><text:span text:style-name="T581"/></text:p>
      <text:p text:style-name="P62"><text:span text:style-name="T582"/><text:span text:style-name="T583"/><text:span text:style-name="T584"/></text:p>
      <text:p text:style-name="P63"><text:span text:style-name="T585"/><text:span text:style-name="T586"/><text:span text:style-name="T587"/></text:p>
      <text:list>
        <text:list-item>
          <text:p text:style-name="P64"><text:span text:style-name="T588"/><text:span text:style-name="T589"/><text:span text:style-name="T590"/></text:p>
        </text:list-item>
        <text:list-item>
          <text:p text:style-name="P65"><text:span text:style-name="T591">Software </text:span><text:span text:style-name="T592">Requirements Specification (SRS)</text:span><text:span text:style-name="T593"/><text:span text:style-name="T594"/></text:p>
        </text:list-item>
        <text:list-item>
          <text:p text:style-name="P66"><text:span text:style-name="T595">1. </text:span><text:span text:style-name="T596">Goal</text:span><text:span text:style-name="T597"/><text:span text:style-name="T598"/></text:p>
        </text:list-item>
      </text:list>
      <text:p text:style-name="P67"><text:span text:style-name="T599">The primary goal is to build a fully deploy-able, high-performance E-commerce platform that provides a seamless shopping experience for customers and robust management tools for administrators.</text:span><text:span text:style-name="T600"/><text:span text:style-name="T601"/></text:p>
      <text:list>
        <text:list-item>
          <text:p text:style-name="P68"><text:span text:style-name="T602">2.</text:span><text:span text:style-name="T603"> Key Deliverables</text:span><text:span text:style-name="T604"/><text:span text:style-name="T605"/></text:p>
        </text:list-item>
      </text:list>
      <text:list text:style-name="WWNum9" text:continue-numbering="true">
        <text:list-item>
          <text:p text:style-name="P69"><text:span text:style-name="T606">Fully functional Client/Retail-facing web application.</text:span><text:span text:style-name="T607"/><text:span text:style-name="T608"/></text:p>
        </text:list-item>
        <text:list-item>
          <text:p text:style-name="P70"><text:span text:style-name="T609">Comprehensive Biz Side (Admin) dashboard for operations.</text:span><text:span text:style-name="T610"/><text:span text:style-name="T611"/></text:p>
        </text:list-item>
        <text:list-item>
          <text:p text:style-name="P71"><text:span text:style-name="T612">Secure Back end API and integrated database.</text:span><text:span text:style-name="T613"/><text:span text:style-name="T614"/></text:p>
        </text:list-item>
      </text:list>
      <text:list>
        <text:list-item>
          <text:p text:style-name="P72"><text:span text:style-name="T615">3. </text:span><text:span text:style-name="T616">Functional Requirements</text:span><text:span text:style-name="T617"> (FR)</text:span><text:span text:style-name="T618"/><text:span text:style-name="T619"/></text:p>
        </text:list-item>
      </text:list>
      <text:p text:style-name="P73"><text:span text:style-name="T620"/><text:span text:style-name="T621"/><text:span text:style-name="T622"/></text:p>
      <text:p text:style-name="P74"><text:span text:style-name="T623"/><text:span text:style-name="T624">FR: </text:span><text:span text:style-name="T625">3.1<text:s text:c="2"/></text:span><text:span text:style-name="T626">Client/Retail Side</text:span><text:span text:style-name="T627">:</text:span><text:span text:style-name="T628"/><text:span text:style-name="T629"/></text:p>
      <text:p text:style-name="P75"><text:span text:style-name="T630"/><text:span text:style-name="T631"/><text:span text:style-name="T632"/></text:p>
      <text:p text:style-name="P76"><text:span text:style-name="T633">FR: 3.1.1</text:span><text:span text:style-name="T634">: </text:span><text:span text:style-name="T635">Product Catalog: </text:span><text:span text:style-name="T636">Search</text:span><text:span text:style-name="T637"> and </text:span><text:span text:style-name="T638">filter</text:span><text:span text:style-name="T639"> functionality for items.</text:span><text:span text:style-name="T640"/><text:span text:style-name="T641"/></text:p>
      <text:p text:style-name="P77"><text:span text:style-name="T642">FR: 3.1.2</text:span><text:span text:style-name="T643">: </text:span><text:span text:style-name="T644">Shopping Cart: Add, remove, and update item quantities.</text:span><text:span text:style-name="T645"/><text:span text:style-name="T646"/></text:p>
      <text:p text:style-name="P78"><text:span text:style-name="T647">FR: 3.1.3</text:span><text:span text:style-name="T648">: </text:span><text:span text:style-name="T649">Checkout &amp; Payment: Integration with electronic payment systems.</text:span><text:span text:style-name="T650"/><text:span text:style-name="T651"/></text:p>
      <text:list>
        <text:list-item>
          <text:p text:style-name="P79"><text:span text:style-name="T652">FR: </text:span><text:span text:style-name="T653">3.2</text:span><text:span text:style-name="T654"> Biz Side (Admin</text:span><text:span text:style-name="T655">)</text:span><text:span text:style-name="T656"/><text:span text:style-name="T657"/></text:p>
        </text:list-item>
      </text:list>
      <text:p text:style-name="P80"><text:span text:style-name="T658"/><text:span text:style-name="T659"/><text:span text:style-name="T660"/></text:p>
      <text:p text:style-name="P81"><text:span text:style-name="T661">FR:3.2.1: </text:span><text:span text:style-name="T662">Inventory Management: CRUD operations for products and categories.</text:span><text:span text:style-name="T663"/><text:span text:style-name="T664"/></text:p>
      <text:p text:style-name="P82"><text:span text:style-name="T665">FR:3.2.2: </text:span><text:span text:style-name="T666">Order Fulfillment: View and update status of customer orders.</text:span><text:span text:style-name="T667"/><text:span text:style-name="T668"/></text:p>
      <text:p text:style-name="P83"><text:span text:style-name="T669">FR:3.2.3: </text:span><text:span text:style-name="T670">Transaction Acknowledgment System: Generating Invoice, Receipt for <text:tab/><text:tab/></text:span><text:span text:style-name="T671"><text:s text:c="6"/></text:span><text:span text:style-name="T672">clients and Logs for Admins.</text:span><text:span text:style-name="T673"> In-app notifications and mails notifications.</text:span><text:span text:style-name="T674"/><text:span text:style-name="T675"/></text:p>
      <text:p text:style-name="P84"><text:span text:style-name="T676">FR:3.2.4: </text:span><text:span text:style-name="T677">User Analytics: Basic reporting on sales and site traffic.</text:span><text:span text:style-name="T678"/><text:span text:style-name="T679"/></text:p>
      <text:p text:style-name="P85"><text:span text:style-name="T680"/><text:span text:style-name="T681"/><text:span text:style-name="T682"/></text:p>
      <text:list>
        <text:list-item>
          <text:p text:style-name="P86"><text:span text:style-name="T683">4. Non-Functional Requirements</text:span><text:span text:style-name="T684"> (NFR)</text:span><text:span text:style-name="T685"/><text:span text:style-name="T686"/></text:p>
        </text:list-item>
      </text:list>
      <text:p text:style-name="P87"><text:span text:style-name="T687">NFR: 4.1 : </text:span><text:span text:style-name="T688">Usability</text:span><text:span text:style-name="T689"> &amp; </text:span><text:span text:style-name="T690">Design</text:span><text:span text:style-name="T691">: Clean, aesthetic</text:span><text:span text:style-name="T692">,semantic</text:span><text:span text:style-name="T693"> UI with minimalist design </text:span><text:span text:style-name="T694"/><text:span text:style-name="T695"/></text:p>
      <text:p text:style-name="P88"><text:span text:style-name="T696">NFR: 4.2 :</text:span><text:span text:style-name="T697"><text:s/></text:span><text:span text:style-name="T698">Performance</text:span><text:span text:style-name="T699">: Fast page load times and optimized back</text:span><text:span text:style-name="T700">-</text:span><text:span text:style-name="T701">end processing.</text:span><text:span text:style-name="T702"/><text:span text:style-name="T703"/></text:p>
      <text:p text:style-name="P89"><text:span text:style-name="T704">NFR: 4.3 :</text:span><text:span text:style-name="T705"><text:s/></text:span><text:span text:style-name="T706">Security</text:span><text:span text:style-name="T707">: </text:span><text:span text:style-name="T708">Ensure security of data and </text:span><text:span text:style-name="T709">payment processing</text:span><text:span text:style-name="T710">s</text:span><text:span text:style-name="T711">.</text:span><text:span text:style-name="T712"/><text:span text:style-name="T713"/></text:p>
      <text:p text:style-name="P90"><text:span text:style-name="T714">NFR: 4.4 :</text:span><text:span text:style-name="T715"><text:s/></text:span><text:span text:style-name="T716">Scalability</text:span><text:span text:style-name="T717">: N-tier architecture to support increasing user traffic.</text:span><text:span text:style-name="T718"/></text:p>
      <text:p text:style-name="P91"><text:span text:style-name="T719"/><text:span text:style-name="T720"/><text:span text:style-name="T721"/></text:p>
      <text:p text:style-name="P92"><text:span text:style-name="T722"/><text:span text:style-name="T723"/><text:span text:style-name="T724"/></text:p>
      <text:p text:style-name="P93"><text:span text:style-name="T725">Project Plan</text:span><text:span text:style-name="T726"/><text:span text:style-name="T727"/><text:span text:style-name="T728"/><text:span text:style-name="T729"/><text:span text:style-name="T730"/><text:span text:style-name="T731"/></text:p>
      <text:p text:style-name="P94"><text:span text:style-name="T732"/><text:span text:style-name="T733"/><text:span text:style-name="T734"/></text:p>
      <text:p text:style-name="P95"><text:span text:style-name="T735">5. </text:span><text:span text:style-name="T736">Team and </text:span><text:span text:style-name="T737">Responsibilities:</text:span><text:span text:style-name="T738"/><text:span text:style-name="T739"/></text:p>
      <text:p text:style-name="P96"><text:span text:style-name="T740"/><text:span text:style-name="T741"/><text:span text:style-name="T742"/></text:p>
      <text:list text:style-name="WWNum1" text:continue-numbering="true">
        <text:list-item>
          <text:p text:style-name="P97"><text:span text:style-name="T743">Design Team</text:span><text:span text:style-name="T744">:</text:span><text:span text:style-name="T745"/><text:span text:style-name="T746"/></text:p>
        </text:list-item>
        <text:list-item>
          <text:list>
            <text:list-item>
              <text:p text:style-name="P98"><text:span text:style-name="T747">Gargee Kakaty</text:span><text:span text:style-name="T748"> (Lead)</text:span><text:span text:style-name="T749"/><text:span text:style-name="T750"/></text:p>
            </text:list-item>
            <text:list-item>
              <text:p text:style-name="P99"><text:span text:style-name="T751">Kaustuva Kashyap</text:span><text:span text:style-name="T752"/><text:span text:style-name="T753"/></text:p>
            </text:list-item>
          </text:list>
        </text:list-item>
        <text:list-item>
          <text:p text:style-name="P100"><text:span text:style-name="T754">Front</text:span><text:span text:style-name="T755">-</text:span><text:span text:style-name="T756">End Development Team:</text:span><text:span text:style-name="T757"/><text:span text:style-name="T758"/></text:p>
        </text:list-item>
        <text:list-item>
          <text:list>
            <text:list-item>
              <text:p text:style-name="P101"><text:span text:style-name="T759">Abhishek Das </text:span><text:span text:style-name="T760">(Lead)</text:span><text:span text:style-name="T761"/><text:span text:style-name="T762"/></text:p>
            </text:list-item>
            <text:list-item>
              <text:p text:style-name="P102"><text:span text:style-name="T763">Gargee Kakaty</text:span><text:span text:style-name="T764"/><text:span text:style-name="T765"/></text:p>
            </text:list-item>
          </text:list>
        </text:list-item>
        <text:list-item>
          <text:p text:style-name="P103"><text:span text:style-name="T766">Back</text:span><text:span text:style-name="T767">-</text:span><text:span text:style-name="T768">end Development Team</text:span><text:span text:style-name="T769"/><text:span text:style-name="T770"/></text:p>
        </text:list-item>
        <text:list-item>
          <text:list>
            <text:list-item>
              <text:p text:style-name="P104"><text:span text:style-name="T771">Ronit Choudhury (C</text:span><text:span text:style-name="T772">o</text:span><text:span text:style-name="T773">- Dev)</text:span><text:span text:style-name="T774"/><text:span text:style-name="T775"/></text:p>
            </text:list-item>
            <text:list-item>
              <text:p text:style-name="P105"><text:span text:style-name="T776">Abhishek Das (Co-Dev)</text:span><text:span text:style-name="T777"/><text:span text:style-name="T778"/></text:p>
            </text:list-item>
          </text:list>
        </text:list-item>
        <text:list-item>
          <text:p text:style-name="P106"><text:span text:style-name="T779">Documentation Team:</text:span><text:span text:style-name="T780"/><text:span text:style-name="T781"/></text:p>
        </text:list-item>
        <text:list-item>
          <text:list>
            <text:list-item>
              <text:p text:style-name="P107"><text:span text:style-name="T782">Ronit Choudhury </text:span><text:span text:style-name="T783"/><text:span text:style-name="T784"/></text:p>
            </text:list-item>
            <text:list-item>
              <text:p text:style-name="P108"><text:span text:style-name="T785">Kaustuva Kashyap</text:span><text:span text:style-name="T786"/><text:span text:style-name="T787"/></text:p>
            </text:list-item>
          </text:list>
        </text:list-item>
      </text:list>
      <text:p text:style-name="P109"><text:span text:style-name="T788"/><text:span text:style-name="T789"/><text:span text:style-name="T790"/></text:p>
      <text:p text:style-name="P110"><text:span text:style-name="T791"/><text:span text:style-name="T792"/><text:span text:style-name="T793"/></text:p>
      <text:p text:style-name="P111"><text:span text:style-name="T794"/><text:span text:style-name="T795"/><text:span text:style-name="T796"/></text:p>
      <text:list>
        <text:list-item>
          <text:p text:style-name="P112"><text:span text:style-name="T797">6. </text:span><text:bookmark-start text:name="_drxih5mt95oi"/><text:span text:style-name="T798"/><text:bookmark-end text:name="_drxih5mt95oi"/><text:span text:style-name="T799">Development Methodology: RAD Evolutionary Model</text:span><text:span text:style-name="T800"/><text:span text:style-name="T801"/></text:p>
        </text:list-item>
      </text:list>
      <text:p text:style-name="P113"><text:span text:style-name="T802">The combined use of the Rapid Application Development (RAD) and Evolutionary Model is ideal for the E-commerce project due to the need for speed, adaptability, and high user focus.</text:span><text:span text:style-name="T803"/><text:span text:style-name="T804"/></text:p>
      <text:p text:style-name="P114"><text:span text:style-name="T805"/><text:span text:style-name="T806"/><text:span text:style-name="T807"/></text:p>
      <text:p text:style-name="P115"><text:span text:style-name="T808">Why RAD and Evolutionary Model are a good fit:</text:span><text:span text:style-name="T809"/><text:span text:style-name="T810"/></text:p>
      <text:list text:style-name="WWNum2" text:continue-numbering="true">
        <text:list-item>
          <text:list>
            <text:list-item>
              <text:p text:style-name="P116"><text:span text:style-name="T811"/><text:span text:style-name="T812">Rapid Delivery and Early Feedback (RAD)</text:span><text:span text:style-name="T813"/><text:span text:style-name="T814"/></text:p>
            </text:list-item>
            <text:list-item>
              <text:p text:style-name="P117"><text:span text:style-name="T815"/><text:span text:style-name="T816">Handling Evolving Requirements (Evolutionary Model)</text:span><text:span text:style-name="T817"/><text:span text:style-name="T818"/></text:p>
            </text:list-item>
            <text:list-item>
              <text:p text:style-name="P118"><text:span text:style-name="T819"/><text:span text:style-name="T820">Risk Mitigation through Iteration</text:span><text:span text:style-name="T821"/><text:span text:style-name="T822"/></text:p>
            </text:list-item>
            <text:list-item>
              <text:p text:style-name="P119"><text:span text:style-name="T823"/><text:span text:style-name="T824">Focus on Usability (RAD)</text:span><text:span text:style-name="T825"><text:s/></text:span><text:span text:style-name="T826"/><text:span text:style-name="T827"/></text:p>
            </text:list-item>
          </text:list>
        </text:list-item>
      </text:list>
      <text:p text:style-name="P120"><text:span text:style-name="T828"/><text:span text:style-name="T829"/><text:span text:style-name="T830"/></text:p>
      <text:p text:style-name="P121"><text:span text:style-name="T831">How the approach will be implemented:</text:span><text:span text:style-name="T832"/><text:span text:style-name="T833"/></text:p>
      <text:list text:style-name="WWNum2" text:continue-numbering="true">
        <text:list-item>
          <text:list>
            <text:list-item>
              <text:p text:style-name="P122"><text:span text:style-name="T834"/><text:span text:style-name="T835">Time</text:span><text:span text:style-name="T836">-</text:span><text:span text:style-name="T837">boxing</text:span><text:span text:style-name="T838">:</text:span><text:span text:style-name="T839"> The project will be broken down into short, fixed-length phases . Each phase will focus on delivering a functional subset of the requirements, such as a "Minimum Viable Shopping Experience" followed by an "Admin Management Module."</text:span><text:span text:style-name="T840"/><text:span text:style-name="T841"/></text:p>
            </text:list-item>
            <text:list-item>
              <text:p text:style-name="P123"><text:span text:style-name="T842"/><text:span text:style-name="T843">Prototyping and Tool-Based Construction</text:span><text:span text:style-name="T844">:</text:span><text:span text:style-name="T845"><text:s/></text:span><text:span text:style-name="T846">The Development teams will leverage integrated development environments (IDEs) and potentially low-code tools for rapid construction of the Biz Side (Admin) dashboard and the secure Backend API, maximizing code reuse and speed.</text:span><text:span text:style-name="T847"/><text:span text:style-name="T848"/></text:p>
            </text:list-item>
            <text:list-item>
              <text:p text:style-name="P124"><text:span text:style-name="T849"/><text:span text:style-name="T850">Concurrent Component Development</text:span><text:span text:style-name="T851">:</text:span><text:span text:style-name="T852"> The Front-end and Back-end teams will work in parallel. While the Back end team </text:span><text:span text:style-name="T853">(Ronit Choudhury</text:span><text:span text:style-name="T854"> and Abhishek Das)</text:span><text:span text:style-name="T855"> develops the core API for Inventory Management, the Front-end team </text:span><text:span text:style-name="T856">(Abhishek Das and Gargee Kakaty)</text:span><text:span text:style-name="T857"> can simultaneously build the client-side UI based on mock data, integrating the components in the later stages of each evolutionary cycle.</text:span><text:span text:style-name="T858"/><text:span text:style-name="T859"/></text:p>
            </text:list-item>
            <text:list-item>
              <text:p text:style-name="P125"><text:span text:style-name="T860"/><text:span text:style-name="T861">Iterative Refinement</text:span><text:span text:style-name="T862">:</text:span><text:span text:style-name="T863"> Each iteration will result in a tested, working deliverable. For example, the first iteration might focus only on the Product Catalog and basic searching, while subsequent iterations add the Shopping Cart, Checkout, and then the Admin-facing modules.</text:span><text:span text:style-name="T864"/><text:span text:style-name="T865"/></text:p>
            </text:list-item>
          </text:list>
        </text:list-item>
      </text:list>
      <text:p text:style-name="P126"><text:span text:style-name="T866"/><text:span text:style-name="T867"/><text:span text:style-name="T868"/></text:p>
      <text:p text:style-name="P127"><text:span text:style-name="T869"/><text:span text:style-name="T870"/><text:span text:style-name="T871"/></text:p>
      <text:p text:style-name="P128"><text:span text:style-name="T872"/><text:span text:style-name="T873"/><text:span text:style-name="T874"/></text:p>
      <text:p text:style-name="P129"><text:span text:style-name="T875"/><text:span text:style-name="T876"/><text:span text:style-name="T877"/></text:p>
      <text:p text:style-name="P130"><text:span text:style-name="T878"/><text:span text:style-name="T879"/><text:span text:style-name="T880"/></text:p>
      <text:p text:style-name="P131"><text:span text:style-name="T881">7. </text:span><text:span text:style-name="T882">Architecture Design Drafts:</text:span><text:span text:style-name="T883"/><text:span text:style-name="T884"/></text:p>
      <text:p text:style-name="P132"><text:span text:style-name="T885"/><text:span text:style-name="T886"/><draw:frame draw:name="Object" draw:style-name="gr3" text:anchor-type="as-char" svg:width="16.35cm" svg:height="6.234cm" svg:x="0cm" svg:y="0cm"><draw:image xlink:href="Pictures/image1.png" xlink:type="simple" xlink:show="embed" xlink:actuate="onLoad"/></draw:frame><text:span text:style-name="T887"/><text:span text:style-name="T888"/></text:p>
      <text:p text:style-name="P133"><text:span text:style-name="T889">Figure </text:span><text:span text:style-name="T890"/><text:bookmark-start text:name="refFigure0"/><text:span text:style-name="T891"/><text:span text:style-name="T892">A</text:span></text:p>
      <text:p text:style-name="P134"><text:span text:style-name="T897"/><text:span text:style-name="T898"/><text:span text:style-name="T899"/></text:p>
      <text:p text:style-name="P135"><text:span text:style-name="T900"/><text:span text:style-name="T901"/><text:span text:style-name="T902"/></text:p>
      <text:p text:style-name="P136"><text:span text:style-name="T903"/><text:span text:style-name="T904"/><text:span text:style-name="T905"/></text:p>
      <text:p text:style-name="P137"><text:span text:style-name="T906">High Level Architecture Design of the platform. The Main Components are:</text:span><text:span text:style-name="T907"/><text:span text:style-name="T908"/></text:p>
      <text:list text:style-name="WWNum14" text:continue-numbering="true">
        <text:list-item>
          <text:p text:style-name="P138"><text:span text:style-name="T909">Customer/Client</text:span><text:span text:style-name="T910"> which supports the following high level functions:</text:span><text:span text:style-name="T911"/><text:span text:style-name="T912"/></text:p>
        </text:list-item>
        <text:list-item>
          <text:list>
            <text:list-item>
              <text:p text:style-name="P139"><text:span text:style-name="T913">Service Offered by the Interface:</text:span><text:span text:style-name="T914"/><text:span text:style-name="T915"/></text:p>
            </text:list-item>
            <text:list-item>
              <text:list>
                <text:list-item>
                  <text:p text:style-name="P140"><text:span text:style-name="T916">Search</text:span><text:span text:style-name="T917">: Searching product catalogue</text:span><text:span text:style-name="T918"/><text:span text:style-name="T919"/></text:p>
                </text:list-item>
                <text:list-item>
                  <text:p text:style-name="P141"><text:span text:style-name="T920"/><text:span text:style-name="T921">Filter</text:span><text:span text:style-name="T922">: Filtering product catalogue by tags</text:span><text:span text:style-name="T923"/><text:span text:style-name="T924"/></text:p>
                </text:list-item>
                <text:list-item>
                  <text:p text:style-name="P142"><text:span text:style-name="T925">Cart</text:span><text:span text:style-name="T926">: Storing products for ordering for saving for future.</text:span><text:span text:style-name="T927"/><text:span text:style-name="T928"/></text:p>
                </text:list-item>
                <text:list-item>
                  <text:p text:style-name="P143"><text:span text:style-name="T929">Checkout </text:span><text:span text:style-name="T930">(includes orders and payment)</text:span><text:span text:style-name="T931"/><text:span text:style-name="T932"/></text:p>
                </text:list-item>
              </text:list>
            </text:list-item>
            <text:list-item>
              <text:p text:style-name="P144"><text:span text:style-name="T933">Servives Offered to the Interface:</text:span><text:span text:style-name="T934"/><text:span text:style-name="T935"/></text:p>
            </text:list-item>
            <text:list-item>
              <text:list>
                <text:list-item>
                  <text:p text:style-name="P145"><text:span text:style-name="T936"/><text:span text:style-name="T937">Product Catalogue Data</text:span><text:span text:style-name="T938"/><text:span text:style-name="T939"/></text:p>
                </text:list-item>
                <text:list-item>
                  <text:p text:style-name="P146"><text:span text:style-name="T940">Cart Status</text:span><text:span text:style-name="T941"/><text:span text:style-name="T942"/></text:p>
                </text:list-item>
                <text:list-item>
                  <text:p text:style-name="P147"><text:span text:style-name="T943"/><text:span text:style-name="T944">Order Status</text:span><text:span text:style-name="T945"/><text:span text:style-name="T946"/></text:p>
                </text:list-item>
              </text:list>
            </text:list-item>
          </text:list>
        </text:list-item>
        <text:list-item>
          <text:p text:style-name="P148"><text:span text:style-name="T947"/><text:span text:style-name="T948">A Main Platform Server</text:span><text:span text:style-name="T949">: Includes the Database and Main Logic</text:span><text:span text:style-name="T950"/><text:span text:style-name="T951"/></text:p>
        </text:list-item>
        <text:list-item>
          <text:p text:style-name="P149"><text:span text:style-name="T952">A Business/ Admin Client </text:span><text:span text:style-name="T953">:</text:span><text:span text:style-name="T954"><text:s text:c="2"/></text:span><text:span text:style-name="T955">for I</text:span><text:span text:style-name="T956">nventory Management/Operations, Reports, logs</text:span><text:span text:style-name="T957"> and Dashboard</text:span><text:span text:style-name="T958"/><text:span text:style-name="T959"/></text:p>
        </text:list-item>
      </text:list>
      <text:p text:style-name="P150"><text:span text:style-name="T960"/><text:span text:style-name="T961"/><text:span text:style-name="T962"/><draw:frame draw:name="Object" draw:style-name="gr4" text:anchor-type="as-char" svg:width="15.32cm" svg:height="6.266cm" svg:x="0cm" svg:y="0cm"><draw:image xlink:href="Pictures/image2.png" xlink:type="simple" xlink:show="embed" xlink:actuate="onLoad"/></draw:frame><text:span text:style-name="T963"/><text:span text:style-name="T964"/><text:span text:style-name="T965"/></text:p>
      <text:p text:style-name="P151"><text:span text:style-name="T966">Figure </text:span><text:span text:style-name="T967"/><text:bookmark-start text:name="refFigure1"/><text:span text:style-name="T968"/><text:span text:style-name="T969">B</text:span></text:p>
      <text:p text:style-name="P152"><text:span text:style-name="T974"/><text:span text:style-name="T975"/><text:span text:style-name="T976"/></text:p>
      <text:p text:style-name="P153"><text:span text:style-name="T977"/><text:span text:style-name="T978"/><text:span text:style-name="T979"/></text:p>
      <text:p text:style-name="P154"><text:span text:style-name="T980"/><text:span text:style-name="T981"/><text:span text:style-name="T982"/></text:p>
      <text:p text:style-name="P155"><text:span text:style-name="T983"/><text:span text:style-name="T984"/><text:span text:style-name="T985"/></text:p>
      <text:p text:style-name="P156"><text:span text:style-name="T986"/><text:span text:style-name="T987">—EOF—</text:span><text:span text:style-name="T988"/><text:span text:style-name="T9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text-align="left"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91">
      <style:paragraph-properties fo:text-align="left"/>
      <style:text-properties fo:font-size="10pt"/>
    </style:style>
    <style:style style:display-name="DStyle_text" style:family="text" style:name="692">
      <style:paragraph-properties/>
    </style:style>
    <style:style style:parent-style-name="691" style:display-name="DStyle_paragraph" style:family="paragraph" style:name="693">
      <style:paragraph-properties fo:text-align="left"/>
      <style:text-properties fo:font-size="10pt"/>
    </style:style>
    <style:style style:parent-style-name="691" style:display-name="DStyle_text" style:family="text" style:name="694">
      <style:paragraph-properties/>
    </style:style>
    <style:style style:parent-style-name="693" style:display-name="DStyle_paragraph" style:family="paragraph" style:name="695">
      <style:paragraph-properties fo:text-align="left"/>
      <style:text-properties fo:font-size="10pt"/>
    </style:style>
    <style:style style:parent-style-name="691" style:display-name="DStyle_text" style:family="text" style:name="696">
      <style:paragraph-properties/>
    </style:style>
    <style:style style:parent-style-name="759" style:display-name="Heading 7" style:family="paragraph" style:name="697">
      <style:paragraph-properties fo:margin-top="2pt" fo:margin-bottom="0pt"/>
      <style:text-properties fo:color="#595959" fo:font-family="Arial" style:font-family-complex="Arial"/>
    </style:style>
    <style:style style:parent-style-name="759" style:display-name="Heading 8" style:family="paragraph" style:name="698">
      <style:paragraph-properties fo:margin-bottom="0pt"/>
      <style:text-properties fo:color="#272727" fo:font-family="Arial" style:font-family-complex="Arial" fo:font-style="italic"/>
    </style:style>
    <style:style style:parent-style-name="759" style:display-name="Heading 9" style:family="paragraph" style:name="69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700">
      <style:paragraph-properties fo:text-align="left"/>
    </style:style>
    <style:style style:parent-style-name="700" style:display-name="Heading 1 Char" style:family="text" style:name="701">
      <style:paragraph-properties/>
      <style:text-properties fo:color="#0f4761" fo:font-family="Arial" style:font-family-complex="Arial" fo:font-size="20pt" style:font-size-complex="20pt"/>
    </style:style>
    <style:style style:parent-style-name="700" style:display-name="Heading 2 Char" style:family="text" style:name="702">
      <style:paragraph-properties/>
      <style:text-properties fo:color="#0f4761" fo:font-family="Arial" style:font-family-complex="Arial" fo:font-size="16pt" style:font-size-complex="16pt"/>
    </style:style>
    <style:style style:parent-style-name="700" style:display-name="Heading 3 Char" style:family="text" style:name="703">
      <style:paragraph-properties/>
      <style:text-properties fo:color="#0f4761" fo:font-family="Arial" style:font-family-complex="Arial" fo:font-size="14pt" style:font-size-complex="14pt"/>
    </style:style>
    <style:style style:parent-style-name="700" style:display-name="Heading 4 Char" style:family="text" style:name="704">
      <style:paragraph-properties/>
      <style:text-properties fo:color="#0f4761" fo:font-family="Arial" style:font-family-complex="Arial" fo:font-style="italic"/>
    </style:style>
    <style:style style:parent-style-name="700" style:display-name="Heading 5 Char" style:family="text" style:name="705">
      <style:paragraph-properties/>
      <style:text-properties fo:color="#0f4761" fo:font-family="Arial" style:font-family-complex="Arial"/>
    </style:style>
    <style:style style:parent-style-name="700" style:display-name="Heading 6 Char" style:family="text" style:name="706">
      <style:paragraph-properties/>
      <style:text-properties fo:color="#595959" fo:font-family="Arial" style:font-family-complex="Arial" fo:font-style="italic"/>
    </style:style>
    <style:style style:parent-style-name="700" style:display-name="Heading 7 Char" style:family="text" style:name="707">
      <style:paragraph-properties/>
      <style:text-properties fo:color="#595959" fo:font-family="Arial" style:font-family-complex="Arial"/>
    </style:style>
    <style:style style:parent-style-name="700" style:display-name="Heading 8 Char" style:family="text" style:name="708">
      <style:paragraph-properties/>
      <style:text-properties fo:color="#272727" fo:font-family="Arial" style:font-family-complex="Arial" fo:font-style="italic"/>
    </style:style>
    <style:style style:parent-style-name="700" style:display-name="Heading 9 Char" style:family="text" style:name="709">
      <style:paragraph-properties/>
      <style:text-properties fo:color="#272727" fo:font-family="Arial" style:font-family-complex="Arial" fo:font-style="italic"/>
    </style:style>
    <style:style style:parent-style-name="700" style:display-name="Title Char" style:family="text" style:name="710">
      <style:paragraph-properties/>
      <style:text-properties fo:font-family="Arial" style:font-family-complex="Arial" fo:font-size="28pt" style:font-size-complex="28pt" fo:letter-spacing="-0.5pt"/>
    </style:style>
    <style:style style:parent-style-name="700" style:display-name="Subtitle Char" style:family="text" style:name="711">
      <style:paragraph-properties/>
      <style:text-properties fo:color="#595959" fo:font-size="14pt" style:font-size-complex="14pt" fo:letter-spacing="0.75pt"/>
    </style:style>
    <style:style style:parent-style-name="759" style:display-name="Quote" style:family="paragraph" style:name="712">
      <style:paragraph-properties fo:text-align="center" fo:margin-top="8pt"/>
      <style:text-properties fo:color="#404040" fo:font-style="italic"/>
    </style:style>
    <style:style style:parent-style-name="700" style:display-name="Quote Char" style:family="text" style:name="713">
      <style:paragraph-properties/>
      <style:text-properties fo:color="#404040" fo:font-style="italic"/>
    </style:style>
    <style:style style:parent-style-name="759" style:display-name="List Paragraph" style:family="paragraph" style:name="714">
      <style:paragraph-properties fo:margin-left="1.27cm" fo:margin-right="0cm" fo:text-indent="0cm"/>
    </style:style>
    <style:style style:parent-style-name="700" style:display-name="Intense Emphasis" style:family="text" style:name="715">
      <style:paragraph-properties/>
      <style:text-properties fo:color="#0f4761" fo:font-style="italic"/>
    </style:style>
    <style:style style:parent-style-name="759" style:display-name="Intense Quote" style:family="paragraph" style:name="716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00" style:display-name="Intense Quote Char" style:family="text" style:name="717">
      <style:paragraph-properties/>
      <style:text-properties fo:color="#0f4761" fo:font-style="italic"/>
    </style:style>
    <style:style style:parent-style-name="700" style:display-name="Intense Reference" style:family="text" style:name="718">
      <style:paragraph-properties/>
      <style:text-properties fo:font-variant="small-caps" fo:color="#0f4761" fo:letter-spacing="0.25pt" fo:font-weight="bold"/>
    </style:style>
    <style:style style:parent-style-name="759" style:display-name="No Spacing" style:family="paragraph" style:name="719">
      <style:paragraph-properties fo:line-height="100%" fo:margin-bottom="0pt"/>
    </style:style>
    <style:style style:parent-style-name="700" style:display-name="Subtle Emphasis" style:family="text" style:name="720">
      <style:paragraph-properties/>
      <style:text-properties fo:color="#404040" fo:font-style="italic"/>
    </style:style>
    <style:style style:parent-style-name="700" style:display-name="Emphasis" style:family="text" style:name="721">
      <style:paragraph-properties/>
      <style:text-properties fo:font-style="italic"/>
    </style:style>
    <style:style style:parent-style-name="700" style:display-name="Strong" style:family="text" style:name="722">
      <style:paragraph-properties/>
      <style:text-properties fo:font-weight="bold"/>
    </style:style>
    <style:style style:parent-style-name="700" style:display-name="Subtle Reference" style:family="text" style:name="723">
      <style:paragraph-properties/>
      <style:text-properties fo:font-variant="small-caps" fo:color="#5a5a5a"/>
    </style:style>
    <style:style style:parent-style-name="700" style:display-name="Book Title" style:family="text" style:name="724">
      <style:paragraph-properties/>
      <style:text-properties fo:letter-spacing="0.25pt" fo:font-style="italic" fo:font-weight="bold"/>
    </style:style>
    <style:style style:parent-style-name="759" style:display-name="Header" style:family="paragraph" style:name="72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00" style:display-name="Header Char" style:family="text" style:name="726">
      <style:paragraph-properties/>
    </style:style>
    <style:style style:parent-style-name="759" style:display-name="Footer" style:family="paragraph" style:name="72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00" style:display-name="Footer Char" style:family="text" style:name="728">
      <style:paragraph-properties/>
    </style:style>
    <style:style style:parent-style-name="759" style:display-name="footnote text" style:family="paragraph" style:name="729">
      <style:paragraph-properties fo:line-height="100%" fo:margin-bottom="0pt"/>
      <style:text-properties fo:font-size="10pt" style:font-size-complex="10pt"/>
    </style:style>
    <style:style style:parent-style-name="700" style:display-name="Footnote Text Char" style:family="text" style:name="730">
      <style:paragraph-properties/>
      <style:text-properties fo:font-size="10pt" style:font-size-complex="10pt"/>
    </style:style>
    <style:style style:parent-style-name="700" style:display-name="footnote reference" style:family="text" style:name="731">
      <style:paragraph-properties/>
      <style:text-properties style:text-position="super 58%"/>
    </style:style>
    <style:style style:parent-style-name="759" style:display-name="endnote text" style:family="paragraph" style:name="732">
      <style:paragraph-properties fo:line-height="100%" fo:margin-bottom="0pt"/>
      <style:text-properties fo:font-size="10pt" style:font-size-complex="10pt"/>
    </style:style>
    <style:style style:parent-style-name="700" style:display-name="Endnote Text Char" style:family="text" style:name="733">
      <style:paragraph-properties/>
      <style:text-properties fo:font-size="10pt" style:font-size-complex="10pt"/>
    </style:style>
    <style:style style:parent-style-name="700" style:display-name="endnote reference" style:family="text" style:name="734">
      <style:paragraph-properties/>
      <style:text-properties style:text-position="super 58%"/>
    </style:style>
    <style:style style:parent-style-name="700" style:display-name="Hyperlink" style:family="text" style:name="73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91" style:display-name="Internet link" style:family="text" style:name="73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91" style:display-name="Internet link" style:family="text" style:name="73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91" style:display-name="Internet link" style:family="text" style:name="73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00" style:display-name="FollowedHyperlink" style:family="text" style:name="73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59" style:display-name="toc 1" style:family="paragraph" style:name="740">
      <style:paragraph-properties fo:margin-bottom="5pt"/>
    </style:style>
    <style:style style:parent-style-name="759" style:display-name="toc 2" style:family="paragraph" style:name="741">
      <style:paragraph-properties fo:margin-left="0.3881cm" fo:margin-right="0cm" fo:text-indent="0cm" fo:margin-bottom="5pt"/>
    </style:style>
    <style:style style:parent-style-name="759" style:display-name="toc 3" style:family="paragraph" style:name="742">
      <style:paragraph-properties fo:margin-left="0.7762cm" fo:margin-right="0cm" fo:text-indent="0cm" fo:margin-bottom="5pt"/>
    </style:style>
    <style:style style:parent-style-name="759" style:display-name="toc 4" style:family="paragraph" style:name="743">
      <style:paragraph-properties fo:margin-left="1.164cm" fo:margin-right="0cm" fo:text-indent="0cm" fo:margin-bottom="5pt"/>
    </style:style>
    <style:style style:parent-style-name="759" style:display-name="toc 5" style:family="paragraph" style:name="744">
      <style:paragraph-properties fo:margin-left="1.552cm" fo:margin-right="0cm" fo:text-indent="0cm" fo:margin-bottom="5pt"/>
    </style:style>
    <style:style style:parent-style-name="759" style:display-name="toc 6" style:family="paragraph" style:name="745">
      <style:paragraph-properties fo:margin-left="1.94cm" fo:margin-right="0cm" fo:text-indent="0cm" fo:margin-bottom="5pt"/>
    </style:style>
    <style:style style:parent-style-name="759" style:display-name="toc 7" style:family="paragraph" style:name="746">
      <style:paragraph-properties fo:margin-left="2.328cm" fo:margin-right="0cm" fo:text-indent="0cm" fo:margin-bottom="5pt"/>
    </style:style>
    <style:style style:parent-style-name="759" style:display-name="toc 8" style:family="paragraph" style:name="747">
      <style:paragraph-properties fo:margin-left="2.717cm" fo:margin-right="0cm" fo:text-indent="0cm" fo:margin-bottom="5pt"/>
    </style:style>
    <style:style style:parent-style-name="759" style:display-name="toc 9" style:family="paragraph" style:name="748">
      <style:paragraph-properties fo:margin-left="3.105cm" fo:margin-right="0cm" fo:text-indent="0cm" fo:margin-bottom="5pt"/>
    </style:style>
    <style:style style:parent-style-name="700" style:display-name="Placeholder Text" style:family="text" style:name="749">
      <style:paragraph-properties/>
      <style:text-properties fo:color="#666666"/>
    </style:style>
    <style:style style:parent-style-name="695" style:display-name="TOC Heading" style:family="paragraph" style:name="750">
      <style:paragraph-properties/>
    </style:style>
    <style:style style:parent-style-name="759" style:display-name="table of figures" style:family="paragraph" style:name="751">
      <style:paragraph-properties fo:margin-bottom="0pt"/>
    </style:style>
    <style:style style:parent-style-name="695" style:display-name="DStyle_paragraph" style:family="paragraph" style:name="752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parent-style-name="752" style:display-name="Standard" style:family="paragraph" style:name="753">
      <style:paragraph-properties fo:line-height="115%"/>
      <style:text-properties/>
    </style:style>
    <style:style style:parent-style-name="753" style:display-name="Heading" style:family="paragraph" style:name="754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53" style:display-name="Text body" style:family="paragraph" style:name="755">
      <style:paragraph-properties fo:line-height="115%" fo:margin-top="0pt" fo:margin-bottom="7pt"/>
      <style:text-properties/>
    </style:style>
    <style:style style:parent-style-name="755" style:display-name="List" style:family="paragraph" style:name="756">
      <style:paragraph-properties/>
    </style:style>
    <style:style style:parent-style-name="753" style:display-name="Caption" style:family="paragraph" style:name="757">
      <style:paragraph-properties fo:margin-top="6pt" fo:margin-bottom="6pt"/>
      <style:text-properties fo:font-size="12pt" style:font-size-complex="12pt" fo:font-style="italic"/>
    </style:style>
    <style:style style:parent-style-name="753" style:display-name="Index" style:family="paragraph" style:name="758">
      <style:paragraph-properties/>
    </style:style>
    <style:style style:parent-style-name="752" style:class="default" style:display-name="Normal" style:family="paragraph" style:name="759">
      <style:paragraph-properties fo:text-align="left"/>
      <style:text-properties/>
    </style:style>
    <style:style style:parent-style-name="759" style:display-name="Heading 1" style:family="paragraph" style:name="760">
      <style:paragraph-properties fo:line-height="100%" fo:margin-top="20pt" fo:margin-bottom="6pt"/>
      <style:text-properties fo:font-size="20pt" style:font-size-complex="20pt"/>
    </style:style>
    <style:style style:parent-style-name="759" style:display-name="Heading 2" style:family="paragraph" style:name="761">
      <style:paragraph-properties fo:line-height="100%" fo:margin-top="18pt" fo:margin-bottom="6pt"/>
      <style:text-properties fo:font-size="16pt" style:font-size-complex="16pt" fo:font-weight="normal"/>
    </style:style>
    <style:style style:parent-style-name="759" style:display-name="Heading 3" style:family="paragraph" style:name="762">
      <style:paragraph-properties fo:line-height="100%" fo:margin-top="16pt" fo:margin-bottom="4pt"/>
      <style:text-properties fo:color="#434343" fo:font-size="14pt" style:font-size-complex="14pt" fo:font-weight="normal"/>
    </style:style>
    <style:style style:parent-style-name="759" style:display-name="Heading 4" style:family="paragraph" style:name="763">
      <style:paragraph-properties fo:line-height="100%" fo:margin-top="14pt" fo:margin-bottom="4pt"/>
      <style:text-properties fo:color="#666666" fo:font-size="12pt" style:font-size-complex="12pt"/>
    </style:style>
    <style:style style:parent-style-name="759" style:display-name="Heading 5" style:family="paragraph" style:name="764">
      <style:paragraph-properties fo:line-height="100%" fo:margin-top="12pt" fo:margin-bottom="4pt"/>
      <style:text-properties fo:color="#666666" fo:font-size="11pt" style:font-size-complex="11pt"/>
    </style:style>
    <style:style style:parent-style-name="759" style:display-name="Heading 6" style:family="paragraph" style:name="765">
      <style:paragraph-properties fo:line-height="100%" fo:margin-top="12pt" fo:margin-bottom="4pt"/>
      <style:text-properties fo:color="#666666" fo:font-size="11pt" style:font-size-complex="11pt" fo:font-style="italic"/>
    </style:style>
    <style:style style:parent-style-name="759" style:display-name="Title" style:family="paragraph" style:name="766">
      <style:paragraph-properties fo:line-height="100%" fo:margin-top="0pt" fo:margin-bottom="3pt"/>
      <style:text-properties fo:font-size="26pt" style:font-size-complex="26pt"/>
    </style:style>
    <style:style style:parent-style-name="759" style:display-name="Subtitle" style:family="paragraph" style:name="767">
      <style:paragraph-properties fo:line-height="100%" fo:margin-top="0pt" fo:margin-bottom="16pt"/>
      <style:text-properties fo:color="#666666" fo:font-family="Arial" style:font-family-complex="Arial" fo:font-size="15pt" style:font-size-complex="15pt" fo:font-style="normal"/>
    </style:style>
    <style:style style:parent-style-name="759" style:display-name="ListLabel 1" style:family="text" style:name="768">
      <style:paragraph-properties/>
      <style:text-properties fo:font-family="Playfair Display" style:font-family-complex="Playfair Display" fo:font-size="14pt" style:text-underline-type="none" style:text-underline-width="auto"/>
    </style:style>
    <style:style style:parent-style-name="759" style:display-name="ListLabel 2" style:family="text" style:name="769">
      <style:paragraph-properties/>
      <style:text-properties fo:font-family="Montserrat" style:font-family-complex="Montserrat" style:text-underline-type="none" style:text-underline-width="auto"/>
    </style:style>
    <style:style style:parent-style-name="759" style:display-name="ListLabel 3" style:family="text" style:name="770">
      <style:paragraph-properties/>
      <style:text-properties style:text-underline-type="none" style:text-underline-width="auto"/>
    </style:style>
    <style:style style:parent-style-name="759" style:display-name="ListLabel 4" style:family="text" style:name="771">
      <style:paragraph-properties/>
      <style:text-properties style:text-underline-type="none" style:text-underline-width="auto"/>
    </style:style>
    <style:style style:parent-style-name="759" style:display-name="ListLabel 5" style:family="text" style:name="772">
      <style:paragraph-properties/>
      <style:text-properties style:text-underline-type="none" style:text-underline-width="auto"/>
    </style:style>
    <style:style style:parent-style-name="759" style:display-name="ListLabel 6" style:family="text" style:name="773">
      <style:paragraph-properties/>
      <style:text-properties style:text-underline-type="none" style:text-underline-width="auto"/>
    </style:style>
    <style:style style:parent-style-name="759" style:display-name="ListLabel 7" style:family="text" style:name="774">
      <style:paragraph-properties/>
      <style:text-properties style:text-underline-type="none" style:text-underline-width="auto"/>
    </style:style>
    <style:style style:parent-style-name="759" style:display-name="ListLabel 8" style:family="text" style:name="775">
      <style:paragraph-properties/>
      <style:text-properties style:text-underline-type="none" style:text-underline-width="auto"/>
    </style:style>
    <style:style style:parent-style-name="759" style:display-name="ListLabel 9" style:family="text" style:name="776">
      <style:paragraph-properties/>
      <style:text-properties style:text-underline-type="none" style:text-underline-width="auto"/>
    </style:style>
    <style:style style:parent-style-name="759" style:display-name="ListLabel 10" style:family="text" style:name="777">
      <style:paragraph-properties/>
      <style:text-properties style:text-underline-type="none" style:text-underline-width="auto"/>
    </style:style>
    <style:style style:parent-style-name="759" style:display-name="ListLabel 11" style:family="text" style:name="778">
      <style:paragraph-properties/>
      <style:text-properties style:text-underline-type="none" style:text-underline-width="auto"/>
    </style:style>
    <style:style style:parent-style-name="759" style:display-name="ListLabel 12" style:family="text" style:name="779">
      <style:paragraph-properties/>
      <style:text-properties style:text-underline-type="none" style:text-underline-width="auto"/>
    </style:style>
    <style:style style:parent-style-name="759" style:display-name="ListLabel 13" style:family="text" style:name="780">
      <style:paragraph-properties/>
      <style:text-properties style:text-underline-type="none" style:text-underline-width="auto"/>
    </style:style>
    <style:style style:parent-style-name="759" style:display-name="ListLabel 14" style:family="text" style:name="781">
      <style:paragraph-properties/>
      <style:text-properties style:text-underline-type="none" style:text-underline-width="auto"/>
    </style:style>
    <style:style style:parent-style-name="759" style:display-name="ListLabel 15" style:family="text" style:name="782">
      <style:paragraph-properties/>
      <style:text-properties style:text-underline-type="none" style:text-underline-width="auto"/>
    </style:style>
    <style:style style:parent-style-name="759" style:display-name="ListLabel 16" style:family="text" style:name="783">
      <style:paragraph-properties/>
      <style:text-properties style:text-underline-type="none" style:text-underline-width="auto"/>
    </style:style>
    <style:style style:parent-style-name="759" style:display-name="ListLabel 17" style:family="text" style:name="784">
      <style:paragraph-properties/>
      <style:text-properties style:text-underline-type="none" style:text-underline-width="auto"/>
    </style:style>
    <style:style style:parent-style-name="759" style:display-name="ListLabel 18" style:family="text" style:name="785">
      <style:paragraph-properties/>
      <style:text-properties style:text-underline-type="none" style:text-underline-width="auto"/>
    </style:style>
    <style:style style:parent-style-name="759" style:display-name="T1" style:family="text" style:name="786">
      <style:paragraph-properties/>
    </style:style>
    <style:style style:parent-style-name="759" style:display-name="T2" style:family="text" style:name="787">
      <style:paragraph-properties/>
    </style:style>
    <style:style style:parent-style-name="759" style:display-name="T3" style:family="text" style:name="788">
      <style:paragraph-properties/>
    </style:style>
    <style:style style:parent-style-name="759" style:display-name="T4" style:family="text" style:name="789">
      <style:paragraph-properties/>
    </style:style>
    <style:style style:parent-style-name="759" style:display-name="T5" style:family="text" style:name="790">
      <style:paragraph-properties/>
    </style:style>
    <style:style style:parent-style-name="759" style:display-name="T6" style:family="text" style:name="791">
      <style:paragraph-properties/>
    </style:style>
    <style:style style:parent-style-name="759" style:display-name="T7" style:family="text" style:name="792">
      <style:paragraph-properties/>
    </style:style>
    <style:style style:parent-style-name="759" style:display-name="T8" style:family="text" style:name="793">
      <style:paragraph-properties/>
    </style:style>
    <style:style style:parent-style-name="759" style:display-name="T9" style:family="text" style:name="794">
      <style:paragraph-properties/>
    </style:style>
    <style:style style:parent-style-name="759" style:display-name="T10" style:family="text" style:name="795">
      <style:paragraph-properties/>
    </style:style>
    <style:style style:parent-style-name="759" style:display-name="T11" style:family="text" style:name="796">
      <style:paragraph-properties/>
    </style:style>
    <style:style style:parent-style-name="759" style:display-name="T12" style:family="text" style:name="797">
      <style:paragraph-properties/>
    </style:style>
    <style:style style:parent-style-name="759" style:display-name="T13" style:family="text" style:name="798">
      <style:paragraph-properties/>
    </style:style>
    <style:style style:parent-style-name="759" style:display-name="T14" style:family="text" style:name="799">
      <style:paragraph-properties/>
    </style:style>
    <style:style style:parent-style-name="759" style:display-name="T15" style:family="text" style:name="800">
      <style:paragraph-properties/>
    </style:style>
    <style:style style:parent-style-name="759" style:display-name="T16" style:family="text" style:name="801">
      <style:paragraph-properties/>
    </style:style>
    <style:style style:parent-style-name="759" style:display-name="T17" style:family="text" style:name="802">
      <style:paragraph-properties/>
    </style:style>
    <style:style style:parent-style-name="759" style:display-name="T18" style:family="text" style:name="803">
      <style:paragraph-properties/>
    </style:style>
    <style:style style:parent-style-name="759" style:display-name="T19" style:family="text" style:name="804">
      <style:paragraph-properties/>
    </style:style>
    <style:style style:parent-style-name="759" style:display-name="T20" style:family="text" style:name="805">
      <style:paragraph-properties/>
    </style:style>
    <style:style style:parent-style-name="759" style:display-name="T21" style:family="text" style:name="806">
      <style:paragraph-properties/>
    </style:style>
    <style:style style:parent-style-name="759" style:display-name="T22" style:family="text" style:name="807">
      <style:paragraph-properties/>
    </style:style>
    <style:style style:parent-style-name="759" style:display-name="T23" style:family="text" style:name="808">
      <style:paragraph-properties/>
    </style:style>
    <style:style style:parent-style-name="759" style:display-name="T24" style:family="text" style:name="809">
      <style:paragraph-properties/>
    </style:style>
    <style:style style:parent-style-name="759" style:display-name="T25" style:family="text" style:name="810">
      <style:paragraph-properties/>
    </style:style>
    <style:style style:parent-style-name="759" style:display-name="T26" style:family="text" style:name="811">
      <style:paragraph-properties/>
    </style:style>
    <style:style style:parent-style-name="759" style:display-name="T27" style:family="text" style:name="812">
      <style:paragraph-properties/>
    </style:style>
    <style:style style:parent-style-name="759" style:display-name="T28" style:family="text" style:name="813">
      <style:paragraph-properties/>
    </style:style>
    <style:style style:parent-style-name="759" style:display-name="T29" style:family="text" style:name="814">
      <style:paragraph-properties/>
    </style:style>
    <style:style style:parent-style-name="759" style:display-name="T30" style:family="text" style:name="815">
      <style:paragraph-properties/>
    </style:style>
    <style:style style:parent-style-name="759" style:display-name="T31" style:family="text" style:name="816">
      <style:paragraph-properties/>
    </style:style>
    <style:style style:parent-style-name="759" style:display-name="T32" style:family="text" style:name="817">
      <style:paragraph-properties/>
    </style:style>
    <style:style style:parent-style-name="759" style:display-name="T33" style:family="text" style:name="818">
      <style:paragraph-properties/>
    </style:style>
    <style:style style:parent-style-name="759" style:display-name="T34" style:family="text" style:name="819">
      <style:paragraph-properties/>
    </style:style>
    <style:style style:parent-style-name="759" style:display-name="T35" style:family="text" style:name="820">
      <style:paragraph-properties/>
    </style:style>
    <style:style style:parent-style-name="759" style:display-name="T36" style:family="text" style:name="821">
      <style:paragraph-properties/>
    </style:style>
    <style:style style:parent-style-name="759" style:display-name="T37" style:family="text" style:name="822">
      <style:paragraph-properties/>
    </style:style>
    <style:style style:parent-style-name="759" style:display-name="T38" style:family="text" style:name="823">
      <style:paragraph-properties/>
    </style:style>
    <style:style style:parent-style-name="759" style:display-name="T39" style:family="text" style:name="824">
      <style:paragraph-properties/>
    </style:style>
    <style:style style:parent-style-name="759" style:display-name="T40" style:family="text" style:name="825">
      <style:paragraph-properties/>
    </style:style>
    <style:style style:parent-style-name="759" style:display-name="T41" style:family="text" style:name="826">
      <style:paragraph-properties/>
    </style:style>
    <style:style style:parent-style-name="759" style:display-name="T42" style:family="text" style:name="827">
      <style:paragraph-properties/>
    </style:style>
    <style:style style:parent-style-name="759" style:display-name="T43" style:family="text" style:name="828">
      <style:paragraph-properties/>
    </style:style>
    <style:style style:parent-style-name="759" style:display-name="T44" style:family="text" style:name="829">
      <style:paragraph-properties/>
    </style:style>
    <style:style style:parent-style-name="759" style:display-name="T45" style:family="text" style:name="830">
      <style:paragraph-properties/>
    </style:style>
    <style:style style:parent-style-name="759" style:display-name="T46" style:family="text" style:name="831">
      <style:paragraph-properties/>
    </style:style>
    <style:style style:parent-style-name="759" style:display-name="T47" style:family="text" style:name="832">
      <style:paragraph-properties/>
    </style:style>
    <style:style style:parent-style-name="759" style:display-name="T48" style:family="text" style:name="833">
      <style:paragraph-properties/>
    </style:style>
    <style:style style:parent-style-name="759" style:display-name="T49" style:family="text" style:name="834">
      <style:paragraph-properties/>
    </style:style>
    <style:style style:parent-style-name="759" style:display-name="T50" style:family="text" style:name="835">
      <style:paragraph-properties/>
    </style:style>
    <style:style style:parent-style-name="759" style:display-name="T51" style:family="text" style:name="836">
      <style:paragraph-properties/>
    </style:style>
    <style:style style:parent-style-name="759" style:display-name="T52" style:family="text" style:name="837">
      <style:paragraph-properties/>
    </style:style>
    <style:style style:parent-style-name="759" style:display-name="T53" style:family="text" style:name="838">
      <style:paragraph-properties/>
    </style:style>
    <style:style style:parent-style-name="759" style:display-name="T54" style:family="text" style:name="839">
      <style:paragraph-properties/>
    </style:style>
    <style:style style:parent-style-name="759" style:display-name="T55" style:family="text" style:name="840">
      <style:paragraph-properties/>
    </style:style>
    <style:style style:parent-style-name="759" style:display-name="T56" style:family="text" style:name="841">
      <style:paragraph-properties/>
    </style:style>
    <style:style style:parent-style-name="759" style:display-name="T57" style:family="text" style:name="842">
      <style:paragraph-properties/>
    </style:style>
    <style:style style:parent-style-name="759" style:display-name="T58" style:family="text" style:name="843">
      <style:paragraph-properties/>
    </style:style>
    <style:style style:parent-style-name="759" style:display-name="T59" style:family="text" style:name="844">
      <style:paragraph-properties/>
    </style:style>
    <style:style style:parent-style-name="759" style:display-name="T60" style:family="text" style:name="845">
      <style:paragraph-properties/>
    </style:style>
    <style:style style:parent-style-name="759" style:display-name="T61" style:family="text" style:name="846">
      <style:paragraph-properties/>
    </style:style>
    <style:style style:parent-style-name="759" style:display-name="T62" style:family="text" style:name="847">
      <style:paragraph-properties/>
    </style:style>
    <style:style style:parent-style-name="759" style:display-name="T63" style:family="text" style:name="848">
      <style:paragraph-properties/>
    </style:style>
    <style:style style:parent-style-name="759" style:display-name="T64" style:family="text" style:name="849">
      <style:paragraph-properties/>
    </style:style>
    <style:style style:parent-style-name="759" style:display-name="T65" style:family="text" style:name="850">
      <style:paragraph-properties/>
    </style:style>
    <style:style style:parent-style-name="759" style:display-name="T66" style:family="text" style:name="851">
      <style:paragraph-properties/>
    </style:style>
    <style:style style:parent-style-name="759" style:display-name="T67" style:family="text" style:name="852">
      <style:paragraph-properties/>
    </style:style>
    <style:style style:parent-style-name="759" style:display-name="T68" style:family="text" style:name="853">
      <style:paragraph-properties/>
    </style:style>
    <style:style style:parent-style-name="759" style:display-name="T69" style:family="text" style:name="854">
      <style:paragraph-properties/>
    </style:style>
    <style:style style:parent-style-name="759" style:display-name="T70" style:family="text" style:name="855">
      <style:paragraph-properties/>
    </style:style>
    <style:style style:parent-style-name="759" style:display-name="T71" style:family="text" style:name="856">
      <style:paragraph-properties/>
    </style:style>
    <style:style style:parent-style-name="759" style:display-name="T72" style:family="text" style:name="857">
      <style:paragraph-properties/>
    </style:style>
    <style:style style:parent-style-name="759" style:display-name="T73" style:family="text" style:name="858">
      <style:paragraph-properties/>
    </style:style>
    <style:style style:parent-style-name="759" style:display-name="T74" style:family="text" style:name="859">
      <style:paragraph-properties/>
    </style:style>
    <style:style style:parent-style-name="759" style:display-name="T75" style:family="text" style:name="860">
      <style:paragraph-properties/>
    </style:style>
    <style:style style:parent-style-name="759" style:display-name="T76" style:family="text" style:name="861">
      <style:paragraph-properties/>
    </style:style>
    <style:style style:parent-style-name="759" style:display-name="T77" style:family="text" style:name="862">
      <style:paragraph-properties/>
    </style:style>
    <style:style style:parent-style-name="759" style:display-name="T78" style:family="text" style:name="863">
      <style:paragraph-properties/>
    </style:style>
    <style:style style:parent-style-name="759" style:display-name="T79" style:family="text" style:name="864">
      <style:paragraph-properties/>
    </style:style>
    <style:style style:parent-style-name="759" style:display-name="T80" style:family="text" style:name="865">
      <style:paragraph-properties/>
    </style:style>
    <style:style style:parent-style-name="759" style:display-name="T81" style:family="text" style:name="866">
      <style:paragraph-properties/>
    </style:style>
    <style:style style:parent-style-name="759" style:display-name="T82" style:family="text" style:name="867">
      <style:paragraph-properties/>
    </style:style>
    <style:style style:parent-style-name="759" style:display-name="T83" style:family="text" style:name="868">
      <style:paragraph-properties/>
    </style:style>
    <style:style style:parent-style-name="759" style:display-name="T84" style:family="text" style:name="869">
      <style:paragraph-properties/>
    </style:style>
    <style:style style:parent-style-name="759" style:display-name="T85" style:family="text" style:name="870">
      <style:paragraph-properties/>
    </style:style>
    <style:style style:parent-style-name="759" style:display-name="T86" style:family="text" style:name="871">
      <style:paragraph-properties/>
    </style:style>
    <style:style style:parent-style-name="759" style:display-name="T87" style:family="text" style:name="872">
      <style:paragraph-properties/>
    </style:style>
    <style:style style:parent-style-name="759" style:display-name="T88" style:family="text" style:name="873">
      <style:paragraph-properties/>
    </style:style>
    <style:style style:parent-style-name="759" style:display-name="T89" style:family="text" style:name="874">
      <style:paragraph-properties/>
    </style:style>
    <style:style style:parent-style-name="759" style:display-name="T90" style:family="text" style:name="875">
      <style:paragraph-properties/>
    </style:style>
    <style:style style:parent-style-name="759" style:display-name="T1" style:family="text" style:name="876">
      <style:paragraph-properties/>
      <style:text-properties fo:font-family="Symbol" style:font-family-complex="Symbol"/>
    </style:style>
    <style:style style:parent-style-name="759" style:display-name="T2" style:family="text" style:name="877">
      <style:paragraph-properties/>
      <style:text-properties fo:font-family="Arial" style:font-family-complex="Arial"/>
    </style:style>
    <style:style style:parent-style-name="759" style:display-name="T3" style:family="text" style:name="878">
      <style:paragraph-properties/>
    </style:style>
    <style:style style:parent-style-name="759" style:display-name="T4" style:family="text" style:name="879">
      <style:paragraph-properties/>
    </style:style>
    <style:style style:parent-style-name="759" style:display-name="T5" style:family="text" style:name="880">
      <style:paragraph-properties/>
    </style:style>
    <style:style style:parent-style-name="759" style:display-name="T6" style:family="text" style:name="881">
      <style:paragraph-properties/>
    </style:style>
    <style:style style:parent-style-name="759" style:display-name="T7" style:family="text" style:name="882">
      <style:paragraph-properties/>
    </style:style>
    <style:style style:parent-style-name="759" style:display-name="T8" style:family="text" style:name="883">
      <style:paragraph-properties/>
    </style:style>
    <style:style style:parent-style-name="759" style:display-name="T9" style:family="text" style:name="884">
      <style:paragraph-properties/>
    </style:style>
    <style:style style:parent-style-name="759" style:display-name="T10" style:family="text" style:name="885">
      <style:paragraph-properties/>
      <style:text-properties fo:font-family="Symbol" style:font-family-complex="Symbol"/>
    </style:style>
    <style:style style:parent-style-name="759" style:display-name="T11" style:family="text" style:name="886">
      <style:paragraph-properties/>
      <style:text-properties fo:font-family="Symbol" style:font-family-complex="Symbol"/>
    </style:style>
    <style:style style:parent-style-name="759" style:display-name="T12" style:family="text" style:name="887">
      <style:paragraph-properties/>
    </style:style>
    <style:style style:parent-style-name="759" style:display-name="T13" style:family="text" style:name="888">
      <style:paragraph-properties/>
    </style:style>
    <style:style style:parent-style-name="759" style:display-name="T14" style:family="text" style:name="889">
      <style:paragraph-properties/>
    </style:style>
    <style:style style:parent-style-name="759" style:display-name="T15" style:family="text" style:name="890">
      <style:paragraph-properties/>
    </style:style>
    <style:style style:parent-style-name="759" style:display-name="T16" style:family="text" style:name="891">
      <style:paragraph-properties/>
    </style:style>
    <style:style style:parent-style-name="759" style:display-name="T17" style:family="text" style:name="892">
      <style:paragraph-properties/>
    </style:style>
    <style:style style:parent-style-name="759" style:display-name="T18" style:family="text" style:name="893">
      <style:paragraph-properties/>
    </style:style>
    <style:style style:parent-style-name="759" style:display-name="T19" style:family="text" style:name="894">
      <style:paragraph-properties/>
    </style:style>
    <style:style style:parent-style-name="759" style:display-name="T20" style:family="text" style:name="895">
      <style:paragraph-properties/>
    </style:style>
    <style:style style:parent-style-name="759" style:display-name="T21" style:family="text" style:name="896">
      <style:paragraph-properties/>
    </style:style>
    <style:style style:parent-style-name="759" style:display-name="T22" style:family="text" style:name="897">
      <style:paragraph-properties/>
    </style:style>
    <style:style style:parent-style-name="759" style:display-name="T23" style:family="text" style:name="898">
      <style:paragraph-properties/>
    </style:style>
    <style:style style:parent-style-name="759" style:display-name="T24" style:family="text" style:name="899">
      <style:paragraph-properties/>
    </style:style>
    <style:style style:parent-style-name="759" style:display-name="T25" style:family="text" style:name="900">
      <style:paragraph-properties/>
    </style:style>
    <style:style style:parent-style-name="759" style:display-name="T26" style:family="text" style:name="901">
      <style:paragraph-properties/>
    </style:style>
    <style:style style:parent-style-name="759" style:display-name="T27" style:family="text" style:name="902">
      <style:paragraph-properties/>
    </style:style>
    <style:style style:parent-style-name="759" style:display-name="T28" style:family="text" style:name="903">
      <style:paragraph-properties/>
    </style:style>
    <style:style style:parent-style-name="759" style:display-name="T29" style:family="text" style:name="904">
      <style:paragraph-properties/>
    </style:style>
    <style:style style:parent-style-name="759" style:display-name="T30" style:family="text" style:name="905">
      <style:paragraph-properties/>
    </style:style>
    <style:style style:parent-style-name="759" style:display-name="T31" style:family="text" style:name="906">
      <style:paragraph-properties/>
    </style:style>
    <style:style style:parent-style-name="759" style:display-name="T32" style:family="text" style:name="907">
      <style:paragraph-properties/>
    </style:style>
    <style:style style:parent-style-name="759" style:display-name="T33" style:family="text" style:name="908">
      <style:paragraph-properties/>
    </style:style>
    <style:style style:parent-style-name="759" style:display-name="T34" style:family="text" style:name="909">
      <style:paragraph-properties/>
    </style:style>
    <style:style style:parent-style-name="759" style:display-name="T35" style:family="text" style:name="910">
      <style:paragraph-properties/>
    </style:style>
    <style:style style:parent-style-name="759" style:display-name="T36" style:family="text" style:name="911">
      <style:paragraph-properties/>
    </style:style>
    <style:style style:parent-style-name="759" style:display-name="T37" style:family="text" style:name="912">
      <style:paragraph-properties/>
    </style:style>
    <style:style style:parent-style-name="759" style:display-name="T38" style:family="text" style:name="913">
      <style:paragraph-properties/>
    </style:style>
    <style:style style:parent-style-name="759" style:display-name="T39" style:family="text" style:name="914">
      <style:paragraph-properties/>
    </style:style>
    <style:style style:parent-style-name="759" style:display-name="T40" style:family="text" style:name="915">
      <style:paragraph-properties/>
    </style:style>
    <style:style style:parent-style-name="759" style:display-name="T41" style:family="text" style:name="916">
      <style:paragraph-properties/>
    </style:style>
    <style:style style:parent-style-name="759" style:display-name="T42" style:family="text" style:name="917">
      <style:paragraph-properties/>
    </style:style>
    <style:style style:parent-style-name="759" style:display-name="T43" style:family="text" style:name="918">
      <style:paragraph-properties/>
    </style:style>
    <style:style style:parent-style-name="759" style:display-name="T44" style:family="text" style:name="919">
      <style:paragraph-properties/>
    </style:style>
    <style:style style:parent-style-name="759" style:display-name="T45" style:family="text" style:name="920">
      <style:paragraph-properties/>
    </style:style>
    <style:style style:parent-style-name="759" style:display-name="T46" style:family="text" style:name="921">
      <style:paragraph-properties/>
    </style:style>
    <style:style style:parent-style-name="759" style:display-name="T47" style:family="text" style:name="922">
      <style:paragraph-properties/>
    </style:style>
    <style:style style:parent-style-name="759" style:display-name="T48" style:family="text" style:name="923">
      <style:paragraph-properties/>
    </style:style>
    <style:style style:parent-style-name="759" style:display-name="T49" style:family="text" style:name="924">
      <style:paragraph-properties/>
    </style:style>
    <style:style style:parent-style-name="759" style:display-name="T50" style:family="text" style:name="925">
      <style:paragraph-properties/>
    </style:style>
    <style:style style:parent-style-name="759" style:display-name="T51" style:family="text" style:name="926">
      <style:paragraph-properties/>
    </style:style>
    <style:style style:parent-style-name="759" style:display-name="T52" style:family="text" style:name="927">
      <style:paragraph-properties/>
    </style:style>
    <style:style style:parent-style-name="759" style:display-name="T53" style:family="text" style:name="928">
      <style:paragraph-properties/>
    </style:style>
    <style:style style:parent-style-name="759" style:display-name="T54" style:family="text" style:name="929">
      <style:paragraph-properties/>
    </style:style>
    <style:style style:parent-style-name="759" style:display-name="T55" style:family="text" style:name="930">
      <style:paragraph-properties/>
    </style:style>
    <style:style style:parent-style-name="759" style:display-name="T56" style:family="text" style:name="931">
      <style:paragraph-properties/>
    </style:style>
    <style:style style:parent-style-name="759" style:display-name="T57" style:family="text" style:name="932">
      <style:paragraph-properties/>
    </style:style>
    <style:style style:parent-style-name="759" style:display-name="T58" style:family="text" style:name="933">
      <style:paragraph-properties/>
    </style:style>
    <style:style style:parent-style-name="759" style:display-name="T59" style:family="text" style:name="934">
      <style:paragraph-properties/>
    </style:style>
    <style:style style:parent-style-name="759" style:display-name="T60" style:family="text" style:name="935">
      <style:paragraph-properties/>
    </style:style>
    <style:style style:parent-style-name="759" style:display-name="T61" style:family="text" style:name="936">
      <style:paragraph-properties/>
    </style:style>
    <style:style style:parent-style-name="759" style:display-name="T62" style:family="text" style:name="937">
      <style:paragraph-properties/>
    </style:style>
    <style:style style:parent-style-name="759" style:display-name="T63" style:family="text" style:name="938">
      <style:paragraph-properties/>
    </style:style>
    <style:style style:parent-style-name="759" style:display-name="T64" style:family="text" style:name="939">
      <style:paragraph-properties/>
    </style:style>
    <style:style style:parent-style-name="759" style:display-name="T65" style:family="text" style:name="940">
      <style:paragraph-properties/>
    </style:style>
    <style:style style:parent-style-name="759" style:display-name="T66" style:family="text" style:name="941">
      <style:paragraph-properties/>
    </style:style>
    <style:style style:parent-style-name="759" style:display-name="T67" style:family="text" style:name="942">
      <style:paragraph-properties/>
    </style:style>
    <style:style style:parent-style-name="759" style:display-name="T68" style:family="text" style:name="943">
      <style:paragraph-properties/>
    </style:style>
    <style:style style:parent-style-name="759" style:display-name="T69" style:family="text" style:name="944">
      <style:paragraph-properties/>
    </style:style>
    <style:style style:parent-style-name="759" style:display-name="T70" style:family="text" style:name="945">
      <style:paragraph-properties/>
    </style:style>
    <style:style style:parent-style-name="759" style:display-name="T71" style:family="text" style:name="946">
      <style:paragraph-properties/>
    </style:style>
    <style:style style:parent-style-name="759" style:display-name="T72" style:family="text" style:name="947">
      <style:paragraph-properties/>
    </style:style>
    <style:style style:parent-style-name="759" style:display-name="T73" style:family="text" style:name="948">
      <style:paragraph-properties/>
    </style:style>
    <style:style style:parent-style-name="759" style:display-name="T74" style:family="text" style:name="949">
      <style:paragraph-properties/>
    </style:style>
    <style:style style:parent-style-name="759" style:display-name="T75" style:family="text" style:name="950">
      <style:paragraph-properties/>
    </style:style>
    <style:style style:parent-style-name="759" style:display-name="T76" style:family="text" style:name="951">
      <style:paragraph-properties/>
    </style:style>
    <style:style style:parent-style-name="759" style:display-name="T77" style:family="text" style:name="952">
      <style:paragraph-properties/>
    </style:style>
    <style:style style:parent-style-name="759" style:display-name="T78" style:family="text" style:name="953">
      <style:paragraph-properties/>
    </style:style>
    <style:style style:parent-style-name="759" style:display-name="T79" style:family="text" style:name="954">
      <style:paragraph-properties/>
    </style:style>
    <style:style style:parent-style-name="759" style:display-name="T80" style:family="text" style:name="955">
      <style:paragraph-properties/>
    </style:style>
    <style:style style:parent-style-name="759" style:display-name="T81" style:family="text" style:name="956">
      <style:paragraph-properties/>
    </style:style>
    <style:style style:parent-style-name="759" style:display-name="T82" style:family="text" style:name="957">
      <style:paragraph-properties/>
    </style:style>
    <style:style style:parent-style-name="759" style:display-name="T83" style:family="text" style:name="958">
      <style:paragraph-properties/>
    </style:style>
    <style:style style:parent-style-name="759" style:display-name="T84" style:family="text" style:name="959">
      <style:paragraph-properties/>
    </style:style>
    <style:style style:parent-style-name="759" style:display-name="T85" style:family="text" style:name="960">
      <style:paragraph-properties/>
    </style:style>
    <style:style style:parent-style-name="759" style:display-name="T86" style:family="text" style:name="961">
      <style:paragraph-properties/>
    </style:style>
    <style:style style:parent-style-name="759" style:display-name="T87" style:family="text" style:name="962">
      <style:paragraph-properties/>
    </style:style>
    <style:style style:parent-style-name="759" style:display-name="T88" style:family="text" style:name="963">
      <style:paragraph-properties/>
    </style:style>
    <style:style style:parent-style-name="759" style:display-name="T89" style:family="text" style:name="964">
      <style:paragraph-properties/>
    </style:style>
    <style:style style:parent-style-name="759" style:display-name="T90" style:family="text" style:name="965">
      <style:paragraph-properties/>
    </style:style>
    <style:style style:parent-style-name="759" style:display-name="T91" style:family="text" style:name="966">
      <style:paragraph-properties/>
    </style:style>
    <style:style style:parent-style-name="759" style:display-name="T92" style:family="text" style:name="967">
      <style:paragraph-properties/>
    </style:style>
    <style:style style:parent-style-name="759" style:display-name="T93" style:family="text" style:name="968">
      <style:paragraph-properties/>
    </style:style>
    <style:style style:parent-style-name="759" style:display-name="T94" style:family="text" style:name="969">
      <style:paragraph-properties/>
    </style:style>
    <style:style style:parent-style-name="759" style:display-name="T95" style:family="text" style:name="970">
      <style:paragraph-properties/>
    </style:style>
    <style:style style:parent-style-name="759" style:display-name="T96" style:family="text" style:name="971">
      <style:paragraph-properties/>
    </style:style>
    <style:style style:parent-style-name="759" style:display-name="T97" style:family="text" style:name="972">
      <style:paragraph-properties/>
    </style:style>
    <style:style style:parent-style-name="759" style:display-name="T98" style:family="text" style:name="973">
      <style:paragraph-properties/>
    </style:style>
    <style:style style:parent-style-name="759" style:display-name="T99" style:family="text" style:name="974">
      <style:paragraph-properties/>
    </style:style>
    <style:style style:parent-style-name="759" style:display-name="T100" style:family="text" style:name="975">
      <style:paragraph-properties/>
      <style:text-properties fo:font-family="Arial" style:font-family-complex="Arial"/>
    </style:style>
    <style:style style:parent-style-name="759" style:display-name="T101" style:family="text" style:name="976">
      <style:paragraph-properties/>
      <style:text-properties fo:font-family="Courier New" style:font-family-complex="Courier New"/>
    </style:style>
    <style:style style:parent-style-name="759" style:display-name="T102" style:family="text" style:name="977">
      <style:paragraph-properties/>
      <style:text-properties fo:font-family="Wingdings" style:font-family-complex="Wingdings"/>
    </style:style>
    <style:style style:parent-style-name="759" style:display-name="T103" style:family="text" style:name="978">
      <style:paragraph-properties/>
      <style:text-properties fo:font-family="Symbol" style:font-family-complex="Symbol"/>
    </style:style>
    <style:style style:parent-style-name="759" style:display-name="T104" style:family="text" style:name="979">
      <style:paragraph-properties/>
      <style:text-properties fo:font-family="Courier New" style:font-family-complex="Courier New"/>
    </style:style>
    <style:style style:parent-style-name="759" style:display-name="T105" style:family="text" style:name="980">
      <style:paragraph-properties/>
      <style:text-properties fo:font-family="Wingdings" style:font-family-complex="Wingdings"/>
    </style:style>
    <style:style style:parent-style-name="759" style:display-name="T106" style:family="text" style:name="981">
      <style:paragraph-properties/>
      <style:text-properties fo:font-family="Symbol" style:font-family-complex="Symbol"/>
    </style:style>
    <style:style style:parent-style-name="759" style:display-name="T107" style:family="text" style:name="982">
      <style:paragraph-properties/>
      <style:text-properties fo:font-family="Courier New" style:font-family-complex="Courier New"/>
    </style:style>
    <style:style style:parent-style-name="759" style:display-name="T108" style:family="text" style:name="983">
      <style:paragraph-properties/>
      <style:text-properties fo:font-family="Wingdings" style:font-family-complex="Wingdings"/>
    </style:style>
    <style:style style:parent-style-name="759" style:display-name="T1" style:family="text" style:name="984">
      <style:paragraph-properties/>
      <style:text-properties fo:font-family="Symbol" style:font-family-complex="Symbol"/>
    </style:style>
    <style:style style:parent-style-name="759" style:display-name="T2" style:family="text" style:name="985">
      <style:paragraph-properties/>
      <style:text-properties fo:font-family="Arial" style:font-family-complex="Arial"/>
    </style:style>
    <style:style style:parent-style-name="759" style:display-name="T3" style:family="text" style:name="986">
      <style:paragraph-properties/>
    </style:style>
    <style:style style:parent-style-name="759" style:display-name="T4" style:family="text" style:name="987">
      <style:paragraph-properties/>
    </style:style>
    <style:style style:parent-style-name="759" style:display-name="T5" style:family="text" style:name="988">
      <style:paragraph-properties/>
    </style:style>
    <style:style style:parent-style-name="759" style:display-name="T6" style:family="text" style:name="989">
      <style:paragraph-properties/>
    </style:style>
    <style:style style:parent-style-name="759" style:display-name="T7" style:family="text" style:name="990">
      <style:paragraph-properties/>
    </style:style>
    <style:style style:parent-style-name="759" style:display-name="T8" style:family="text" style:name="991">
      <style:paragraph-properties/>
    </style:style>
    <style:style style:parent-style-name="759" style:display-name="T9" style:family="text" style:name="992">
      <style:paragraph-properties/>
    </style:style>
    <style:style style:parent-style-name="759" style:display-name="T10" style:family="text" style:name="993">
      <style:paragraph-properties/>
      <style:text-properties fo:font-family="Symbol" style:font-family-complex="Symbol"/>
    </style:style>
    <style:style style:parent-style-name="759" style:display-name="T11" style:family="text" style:name="994">
      <style:paragraph-properties/>
      <style:text-properties fo:font-family="Symbol" style:font-family-complex="Symbol"/>
    </style:style>
    <style:style style:parent-style-name="759" style:display-name="T12" style:family="text" style:name="995">
      <style:paragraph-properties/>
    </style:style>
    <style:style style:parent-style-name="759" style:display-name="T13" style:family="text" style:name="996">
      <style:paragraph-properties/>
    </style:style>
    <style:style style:parent-style-name="759" style:display-name="T14" style:family="text" style:name="997">
      <style:paragraph-properties/>
    </style:style>
    <style:style style:parent-style-name="759" style:display-name="T15" style:family="text" style:name="998">
      <style:paragraph-properties/>
    </style:style>
    <style:style style:parent-style-name="759" style:display-name="T16" style:family="text" style:name="999">
      <style:paragraph-properties/>
    </style:style>
    <style:style style:parent-style-name="759" style:display-name="T17" style:family="text" style:name="1000">
      <style:paragraph-properties/>
    </style:style>
    <style:style style:parent-style-name="759" style:display-name="T18" style:family="text" style:name="1001">
      <style:paragraph-properties/>
    </style:style>
    <style:style style:parent-style-name="759" style:display-name="T19" style:family="text" style:name="1002">
      <style:paragraph-properties/>
    </style:style>
    <style:style style:parent-style-name="759" style:display-name="T20" style:family="text" style:name="1003">
      <style:paragraph-properties/>
    </style:style>
    <style:style style:parent-style-name="759" style:display-name="T21" style:family="text" style:name="1004">
      <style:paragraph-properties/>
    </style:style>
    <style:style style:parent-style-name="759" style:display-name="T22" style:family="text" style:name="1005">
      <style:paragraph-properties/>
    </style:style>
    <style:style style:parent-style-name="759" style:display-name="T23" style:family="text" style:name="1006">
      <style:paragraph-properties/>
    </style:style>
    <style:style style:parent-style-name="759" style:display-name="T24" style:family="text" style:name="1007">
      <style:paragraph-properties/>
    </style:style>
    <style:style style:parent-style-name="759" style:display-name="T25" style:family="text" style:name="1008">
      <style:paragraph-properties/>
    </style:style>
    <style:style style:parent-style-name="759" style:display-name="T26" style:family="text" style:name="1009">
      <style:paragraph-properties/>
    </style:style>
    <style:style style:parent-style-name="759" style:display-name="T27" style:family="text" style:name="1010">
      <style:paragraph-properties/>
    </style:style>
    <style:style style:parent-style-name="759" style:display-name="T28" style:family="text" style:name="1011">
      <style:paragraph-properties/>
    </style:style>
    <style:style style:parent-style-name="759" style:display-name="T29" style:family="text" style:name="1012">
      <style:paragraph-properties/>
    </style:style>
    <style:style style:parent-style-name="759" style:display-name="T30" style:family="text" style:name="1013">
      <style:paragraph-properties/>
    </style:style>
    <style:style style:parent-style-name="759" style:display-name="T31" style:family="text" style:name="1014">
      <style:paragraph-properties/>
    </style:style>
    <style:style style:parent-style-name="759" style:display-name="T32" style:family="text" style:name="1015">
      <style:paragraph-properties/>
    </style:style>
    <style:style style:parent-style-name="759" style:display-name="T33" style:family="text" style:name="1016">
      <style:paragraph-properties/>
    </style:style>
    <style:style style:parent-style-name="759" style:display-name="T34" style:family="text" style:name="1017">
      <style:paragraph-properties/>
    </style:style>
    <style:style style:parent-style-name="759" style:display-name="T35" style:family="text" style:name="1018">
      <style:paragraph-properties/>
    </style:style>
    <style:style style:parent-style-name="759" style:display-name="T36" style:family="text" style:name="1019">
      <style:paragraph-properties/>
    </style:style>
    <style:style style:parent-style-name="759" style:display-name="T37" style:family="text" style:name="1020">
      <style:paragraph-properties/>
    </style:style>
    <style:style style:parent-style-name="759" style:display-name="T38" style:family="text" style:name="1021">
      <style:paragraph-properties/>
    </style:style>
    <style:style style:parent-style-name="759" style:display-name="T39" style:family="text" style:name="1022">
      <style:paragraph-properties/>
    </style:style>
    <style:style style:parent-style-name="759" style:display-name="T40" style:family="text" style:name="1023">
      <style:paragraph-properties/>
    </style:style>
    <style:style style:parent-style-name="759" style:display-name="T41" style:family="text" style:name="1024">
      <style:paragraph-properties/>
    </style:style>
    <style:style style:parent-style-name="759" style:display-name="T42" style:family="text" style:name="1025">
      <style:paragraph-properties/>
    </style:style>
    <style:style style:parent-style-name="759" style:display-name="T43" style:family="text" style:name="1026">
      <style:paragraph-properties/>
    </style:style>
    <style:style style:parent-style-name="759" style:display-name="T44" style:family="text" style:name="1027">
      <style:paragraph-properties/>
    </style:style>
    <style:style style:parent-style-name="759" style:display-name="T45" style:family="text" style:name="1028">
      <style:paragraph-properties/>
    </style:style>
    <style:style style:parent-style-name="759" style:display-name="T46" style:family="text" style:name="1029">
      <style:paragraph-properties/>
    </style:style>
    <style:style style:parent-style-name="759" style:display-name="T47" style:family="text" style:name="1030">
      <style:paragraph-properties/>
    </style:style>
    <style:style style:parent-style-name="759" style:display-name="T48" style:family="text" style:name="1031">
      <style:paragraph-properties/>
    </style:style>
    <style:style style:parent-style-name="759" style:display-name="T49" style:family="text" style:name="1032">
      <style:paragraph-properties/>
    </style:style>
    <style:style style:parent-style-name="759" style:display-name="T50" style:family="text" style:name="1033">
      <style:paragraph-properties/>
    </style:style>
    <style:style style:parent-style-name="759" style:display-name="T51" style:family="text" style:name="1034">
      <style:paragraph-properties/>
    </style:style>
    <style:style style:parent-style-name="759" style:display-name="T52" style:family="text" style:name="1035">
      <style:paragraph-properties/>
    </style:style>
    <style:style style:parent-style-name="759" style:display-name="T53" style:family="text" style:name="1036">
      <style:paragraph-properties/>
    </style:style>
    <style:style style:parent-style-name="759" style:display-name="T54" style:family="text" style:name="1037">
      <style:paragraph-properties/>
    </style:style>
    <style:style style:parent-style-name="759" style:display-name="T55" style:family="text" style:name="1038">
      <style:paragraph-properties/>
    </style:style>
    <style:style style:parent-style-name="759" style:display-name="T56" style:family="text" style:name="1039">
      <style:paragraph-properties/>
    </style:style>
    <style:style style:parent-style-name="759" style:display-name="T57" style:family="text" style:name="1040">
      <style:paragraph-properties/>
    </style:style>
    <style:style style:parent-style-name="759" style:display-name="T58" style:family="text" style:name="1041">
      <style:paragraph-properties/>
    </style:style>
    <style:style style:parent-style-name="759" style:display-name="T59" style:family="text" style:name="1042">
      <style:paragraph-properties/>
    </style:style>
    <style:style style:parent-style-name="759" style:display-name="T60" style:family="text" style:name="1043">
      <style:paragraph-properties/>
    </style:style>
    <style:style style:parent-style-name="759" style:display-name="T61" style:family="text" style:name="1044">
      <style:paragraph-properties/>
    </style:style>
    <style:style style:parent-style-name="759" style:display-name="T62" style:family="text" style:name="1045">
      <style:paragraph-properties/>
    </style:style>
    <style:style style:parent-style-name="759" style:display-name="T63" style:family="text" style:name="1046">
      <style:paragraph-properties/>
    </style:style>
    <style:style style:parent-style-name="759" style:display-name="T64" style:family="text" style:name="1047">
      <style:paragraph-properties/>
    </style:style>
    <style:style style:parent-style-name="759" style:display-name="T65" style:family="text" style:name="1048">
      <style:paragraph-properties/>
    </style:style>
    <style:style style:parent-style-name="759" style:display-name="T66" style:family="text" style:name="1049">
      <style:paragraph-properties/>
    </style:style>
    <style:style style:parent-style-name="759" style:display-name="T67" style:family="text" style:name="1050">
      <style:paragraph-properties/>
    </style:style>
    <style:style style:parent-style-name="759" style:display-name="T68" style:family="text" style:name="1051">
      <style:paragraph-properties/>
    </style:style>
    <style:style style:parent-style-name="759" style:display-name="T69" style:family="text" style:name="1052">
      <style:paragraph-properties/>
    </style:style>
    <style:style style:parent-style-name="759" style:display-name="T70" style:family="text" style:name="1053">
      <style:paragraph-properties/>
    </style:style>
    <style:style style:parent-style-name="759" style:display-name="T71" style:family="text" style:name="1054">
      <style:paragraph-properties/>
    </style:style>
    <style:style style:parent-style-name="759" style:display-name="T72" style:family="text" style:name="1055">
      <style:paragraph-properties/>
    </style:style>
    <style:style style:parent-style-name="759" style:display-name="T73" style:family="text" style:name="1056">
      <style:paragraph-properties/>
    </style:style>
    <style:style style:parent-style-name="759" style:display-name="T74" style:family="text" style:name="1057">
      <style:paragraph-properties/>
    </style:style>
    <style:style style:parent-style-name="759" style:display-name="T75" style:family="text" style:name="1058">
      <style:paragraph-properties/>
    </style:style>
    <style:style style:parent-style-name="759" style:display-name="T76" style:family="text" style:name="1059">
      <style:paragraph-properties/>
    </style:style>
    <style:style style:parent-style-name="759" style:display-name="T77" style:family="text" style:name="1060">
      <style:paragraph-properties/>
    </style:style>
    <style:style style:parent-style-name="759" style:display-name="T78" style:family="text" style:name="1061">
      <style:paragraph-properties/>
    </style:style>
    <style:style style:parent-style-name="759" style:display-name="T79" style:family="text" style:name="1062">
      <style:paragraph-properties/>
    </style:style>
    <style:style style:parent-style-name="759" style:display-name="T80" style:family="text" style:name="1063">
      <style:paragraph-properties/>
    </style:style>
    <style:style style:parent-style-name="759" style:display-name="T81" style:family="text" style:name="1064">
      <style:paragraph-properties/>
    </style:style>
    <style:style style:parent-style-name="759" style:display-name="T82" style:family="text" style:name="1065">
      <style:paragraph-properties/>
    </style:style>
    <style:style style:parent-style-name="759" style:display-name="T83" style:family="text" style:name="1066">
      <style:paragraph-properties/>
    </style:style>
    <style:style style:parent-style-name="759" style:display-name="T84" style:family="text" style:name="1067">
      <style:paragraph-properties/>
    </style:style>
    <style:style style:parent-style-name="759" style:display-name="T85" style:family="text" style:name="1068">
      <style:paragraph-properties/>
    </style:style>
    <style:style style:parent-style-name="759" style:display-name="T86" style:family="text" style:name="1069">
      <style:paragraph-properties/>
    </style:style>
    <style:style style:parent-style-name="759" style:display-name="T87" style:family="text" style:name="1070">
      <style:paragraph-properties/>
    </style:style>
    <style:style style:parent-style-name="759" style:display-name="T88" style:family="text" style:name="1071">
      <style:paragraph-properties/>
    </style:style>
    <style:style style:parent-style-name="759" style:display-name="T89" style:family="text" style:name="1072">
      <style:paragraph-properties/>
    </style:style>
    <style:style style:parent-style-name="759" style:display-name="T90" style:family="text" style:name="1073">
      <style:paragraph-properties/>
    </style:style>
    <style:style style:parent-style-name="759" style:display-name="T91" style:family="text" style:name="1074">
      <style:paragraph-properties/>
    </style:style>
    <style:style style:parent-style-name="759" style:display-name="T92" style:family="text" style:name="1075">
      <style:paragraph-properties/>
    </style:style>
    <style:style style:parent-style-name="759" style:display-name="T93" style:family="text" style:name="1076">
      <style:paragraph-properties/>
    </style:style>
    <style:style style:parent-style-name="759" style:display-name="T94" style:family="text" style:name="1077">
      <style:paragraph-properties/>
    </style:style>
    <style:style style:parent-style-name="759" style:display-name="T95" style:family="text" style:name="1078">
      <style:paragraph-properties/>
    </style:style>
    <style:style style:parent-style-name="759" style:display-name="T96" style:family="text" style:name="1079">
      <style:paragraph-properties/>
    </style:style>
    <style:style style:parent-style-name="759" style:display-name="T97" style:family="text" style:name="1080">
      <style:paragraph-properties/>
    </style:style>
    <style:style style:parent-style-name="759" style:display-name="T98" style:family="text" style:name="1081">
      <style:paragraph-properties/>
    </style:style>
    <style:style style:parent-style-name="759" style:display-name="T99" style:family="text" style:name="1082">
      <style:paragraph-properties/>
    </style:style>
    <style:style style:parent-style-name="759" style:display-name="T100" style:family="text" style:name="1083">
      <style:paragraph-properties/>
      <style:text-properties fo:font-family="Arial" style:font-family-complex="Arial"/>
    </style:style>
    <style:style style:parent-style-name="759" style:display-name="T101" style:family="text" style:name="1084">
      <style:paragraph-properties/>
      <style:text-properties fo:font-family="Courier New" style:font-family-complex="Courier New"/>
    </style:style>
    <style:style style:parent-style-name="759" style:display-name="T102" style:family="text" style:name="1085">
      <style:paragraph-properties/>
      <style:text-properties fo:font-family="Wingdings" style:font-family-complex="Wingdings"/>
    </style:style>
    <style:style style:parent-style-name="759" style:display-name="T103" style:family="text" style:name="1086">
      <style:paragraph-properties/>
      <style:text-properties fo:font-family="Symbol" style:font-family-complex="Symbol"/>
    </style:style>
    <style:style style:parent-style-name="759" style:display-name="T104" style:family="text" style:name="1087">
      <style:paragraph-properties/>
      <style:text-properties fo:font-family="Courier New" style:font-family-complex="Courier New"/>
    </style:style>
    <style:style style:parent-style-name="759" style:display-name="T105" style:family="text" style:name="1088">
      <style:paragraph-properties/>
      <style:text-properties fo:font-family="Wingdings" style:font-family-complex="Wingdings"/>
    </style:style>
    <style:style style:parent-style-name="759" style:display-name="T106" style:family="text" style:name="1089">
      <style:paragraph-properties/>
      <style:text-properties fo:font-family="Symbol" style:font-family-complex="Symbol"/>
    </style:style>
    <style:style style:parent-style-name="759" style:display-name="T107" style:family="text" style:name="1090">
      <style:paragraph-properties/>
      <style:text-properties fo:font-family="Courier New" style:font-family-complex="Courier New"/>
    </style:style>
    <style:style style:parent-style-name="759" style:display-name="T108" style:family="text" style:name="1091">
      <style:paragraph-properties/>
      <style:text-properties fo:font-family="Wingdings" style:font-family-complex="Wingdings"/>
    </style:style>
    <style:style style:parent-style-name="759" style:display-name="T109" style:family="text" style:name="1092">
      <style:paragraph-properties/>
      <style:text-properties fo:font-family="Arial" style:font-family-complex="Arial"/>
    </style:style>
    <style:style style:parent-style-name="759" style:display-name="T110" style:family="text" style:name="1093">
      <style:paragraph-properties/>
      <style:text-properties fo:font-family="Courier New" style:font-family-complex="Courier New"/>
    </style:style>
    <style:style style:parent-style-name="759" style:display-name="T111" style:family="text" style:name="1094">
      <style:paragraph-properties/>
      <style:text-properties fo:font-family="Wingdings" style:font-family-complex="Wingdings"/>
    </style:style>
    <style:style style:parent-style-name="759" style:display-name="T112" style:family="text" style:name="1095">
      <style:paragraph-properties/>
      <style:text-properties fo:font-family="Symbol" style:font-family-complex="Symbol"/>
    </style:style>
    <style:style style:parent-style-name="759" style:display-name="T113" style:family="text" style:name="1096">
      <style:paragraph-properties/>
      <style:text-properties fo:font-family="Courier New" style:font-family-complex="Courier New"/>
    </style:style>
    <style:style style:parent-style-name="759" style:display-name="T114" style:family="text" style:name="1097">
      <style:paragraph-properties/>
      <style:text-properties fo:font-family="Wingdings" style:font-family-complex="Wingdings"/>
    </style:style>
    <style:style style:parent-style-name="759" style:display-name="T115" style:family="text" style:name="1098">
      <style:paragraph-properties/>
      <style:text-properties fo:font-family="Symbol" style:font-family-complex="Symbol"/>
    </style:style>
    <style:style style:parent-style-name="759" style:display-name="T116" style:family="text" style:name="1099">
      <style:paragraph-properties/>
      <style:text-properties fo:font-family="Courier New" style:font-family-complex="Courier New"/>
    </style:style>
    <style:style style:parent-style-name="759" style:display-name="T117" style:family="text" style:name="1100">
      <style:paragraph-properties/>
      <style:text-properties fo:font-family="Wingdings" style:font-family-complex="Wingdings"/>
    </style:style>
    <style:style style:parent-style-name="759" style:display-name="T118" style:family="text" style:name="1101">
      <style:paragraph-properties/>
      <style:text-properties fo:font-family="Symbol" style:font-family-complex="Symbol"/>
    </style:style>
    <style:style style:parent-style-name="759" style:display-name="T119" style:family="text" style:name="1102">
      <style:paragraph-properties/>
      <style:text-properties fo:font-family="Courier New" style:font-family-complex="Courier New"/>
    </style:style>
    <style:style style:parent-style-name="759" style:display-name="T120" style:family="text" style:name="1103">
      <style:paragraph-properties/>
      <style:text-properties fo:font-family="Wingdings" style:font-family-complex="Wingdings"/>
    </style:style>
    <style:style style:parent-style-name="759" style:display-name="T121" style:family="text" style:name="1104">
      <style:paragraph-properties/>
      <style:text-properties fo:font-family="Symbol" style:font-family-complex="Symbol"/>
    </style:style>
    <style:style style:parent-style-name="759" style:display-name="T122" style:family="text" style:name="1105">
      <style:paragraph-properties/>
      <style:text-properties fo:font-family="Courier New" style:font-family-complex="Courier New"/>
    </style:style>
    <style:style style:parent-style-name="759" style:display-name="T123" style:family="text" style:name="1106">
      <style:paragraph-properties/>
      <style:text-properties fo:font-family="Wingdings" style:font-family-complex="Wingdings"/>
    </style:style>
    <style:style style:parent-style-name="759" style:display-name="T124" style:family="text" style:name="1107">
      <style:paragraph-properties/>
      <style:text-properties fo:font-family="Symbol" style:font-family-complex="Symbol"/>
    </style:style>
    <style:style style:parent-style-name="759" style:display-name="T125" style:family="text" style:name="1108">
      <style:paragraph-properties/>
      <style:text-properties fo:font-family="Courier New" style:font-family-complex="Courier New"/>
    </style:style>
    <style:style style:parent-style-name="759" style:display-name="T126" style:family="text" style:name="1109">
      <style:paragraph-properties/>
      <style:text-properties fo:font-family="Wingdings" style:font-family-complex="Wingdings"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Arial" style:font-family-complex="Arial"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Symbol" style:font-family-complex="Symbol"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 fo:font-family="Arial" style:font-family-complex="Arial"/>
    </style:style>
    <style:style style:family="text" style:name="T101">
      <style:text-properties fo:font-family="Courier New" style:font-family-complex="Courier New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Symbol" style:font-family-complex="Symbol"/>
    </style:style>
    <style:style style:family="text" style:name="T104">
      <style:text-properties fo:font-family="Courier New" style:font-family-complex="Courier New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Symbol" style:font-family-complex="Symbol"/>
    </style:style>
    <style:style style:family="text" style:name="T107">
      <style:text-properties fo:font-family="Courier New" style:font-family-complex="Courier New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Arial" style:font-family-complex="Arial"/>
    </style:style>
    <style:style style:family="text" style:name="T110">
      <style:text-properties fo:font-family="Courier New" style:font-family-complex="Courier New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Symbol" style:font-family-complex="Symbol"/>
    </style:style>
    <style:style style:family="text" style:name="T113">
      <style:text-properties fo:font-family="Courier New" style:font-family-complex="Courier New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Symbol" style:font-family-complex="Symbol"/>
    </style:style>
    <style:style style:family="text" style:name="T116">
      <style:text-properties fo:font-family="Courier New" style:font-family-complex="Courier New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Symbol" style:font-family-complex="Symbol"/>
    </style:style>
    <style:style style:family="text" style:name="T119">
      <style:text-properties fo:font-family="Courier New" style:font-family-complex="Courier New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Symbol" style:font-family-complex="Symbol"/>
    </style:style>
    <style:style style:family="text" style:name="T122">
      <style:text-properties fo:font-family="Courier New" style:font-family-complex="Courier New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Symbol" style:font-family-complex="Symbol"/>
    </style:style>
    <style:style style:family="text" style:name="T125">
      <style:text-properties fo:font-family="Courier New" style:font-family-complex="Courier New"/>
    </style:style>
    <style:style style:family="text" style:name="T126">
      <style:text-properties fo:font-family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complex="Arial"/>
      </text:list-level-style-bullet>
      <text:list-level-style-bullet text:level="3" text:style-name="T3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6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9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complex="Symbol"/>
      </text:list-level-style-bullet>
      <text:list-level-style-bullet text:level="3" text:style-name="T12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15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18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21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24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27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30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33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36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39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42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45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48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51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54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7">
      <text:list-level-style-bullet text:level="1" text:style-name="T5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57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60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63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8">
      <text:list-level-style-bullet text:level="1" text:style-name="T6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66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69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72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9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75" text:bullet-char="■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6" text:style-name="T78" text:bullet-char="■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9" text:style-name="T81" text:bullet-char="■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10">
      <text:list-level-style-bullet text:level="1" text:style-name="T82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83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84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85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86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87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88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9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0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12">
      <text:list-level-style-bullet text:level="1" text:style-name="T100" text:bullet-char="–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Arial" style:font-family-complex="Aria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3.95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2.54cm" fo:margin-left="2.54cm" fo:margin-right="2.54cm"/>
    </style:page-layout>
    <style:page-layout style:name="Mpm2">
      <style:page-layout-properties fo:page-width="21cm" fo:page-height="29.7cm" style:print-orientation="portrait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